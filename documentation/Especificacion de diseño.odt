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90000014C4F418559.jpg" manifest:media-type="image/jpeg"/>
  <manifest:file-entry manifest:full-path="Pictures/10000000000006D6000003599082712B.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3A900000151A9397944.jpg" manifest:media-type="image/jpeg"/>
  <manifest:file-entry manifest:full-path="Pictures/100000000000019C00000190E65C149F.jpg" manifest:media-type="image/jpeg"/>
  <manifest:file-entry manifest:full-path="Pictures/10000000000001EF00000297CDA77201.jpg" manifest:media-type="image/jpeg"/>
  <manifest:file-entry manifest:full-path="Pictures/10000000000002210000017000D59796.jpg" manifest:media-type="image/jpeg"/>
  <manifest:file-entry manifest:full-path="Pictures/100000000000021700000154FA90F404.jpg" manifest:media-type="image/jpeg"/>
  <manifest:file-entry manifest:full-path="Pictures/100000000000078000000468674304CE.png" manifest:media-type="image/png"/>
  <manifest:file-entry manifest:full-path="Pictures/1000000000000780000004680A373D7D.png" manifest:media-type="image/png"/>
  <manifest:file-entry manifest:full-path="Pictures/1000000000000780000004685D1C6CA6.png" manifest:media-type="image/png"/>
  <manifest:file-entry manifest:full-path="Pictures/1000000000000556000002D05E179F0C.png" manifest:media-type="image/png"/>
  <manifest:file-entry manifest:full-path="Pictures/1000000000000556000002D0D74F9889.png" manifest:media-type="image/png"/>
  <manifest:file-entry manifest:full-path="Pictures/1000000000000556000002D03CDEF04B.png" manifest:media-type="image/png"/>
  <manifest:file-entry manifest:full-path="Pictures/1000000000000556000002D046DF2E83.png" manifest:media-type="image/png"/>
  <manifest:file-entry manifest:full-path="Pictures/1000000000000556000002D044D50629.png" manifest:media-type="image/png"/>
  <manifest:file-entry manifest:full-path="Pictures/1000000000000556000002D08EB3E518.png" manifest:media-type="image/png"/>
  <manifest:file-entry manifest:full-path="Pictures/1000000000000556000002D0937D4AA8.png" manifest:media-type="image/png"/>
  <manifest:file-entry manifest:full-path="Pictures/1000000000000556000002D0BD0C8B8D.png" manifest:media-type="image/png"/>
  <manifest:file-entry manifest:full-path="Pictures/1000000000000780000004689938D4B2.png" manifest:media-type="image/png"/>
  <manifest:file-entry manifest:full-path="Pictures/1000000000000556000002D094F6C3A2.png" manifest:media-type="image/png"/>
  <manifest:file-entry manifest:full-path="Pictures/10000000000007800000046825AE7738.png" manifest:media-type="image/png"/>
  <manifest:file-entry manifest:full-path="Pictures/1000000000000556000002D018A97BA8.png" manifest:media-type="image/png"/>
  <manifest:file-entry manifest:full-path="Pictures/1000000000000556000002D0B6132318.png" manifest:media-type="image/png"/>
  <manifest:file-entry manifest:full-path="Pictures/1000000000000556000002D0F4FC4DA8.png" manifest:media-type="image/png"/>
  <manifest:file-entry manifest:full-path="Pictures/1000000000000556000002D0369F0125.png" manifest:media-type="image/png"/>
  <manifest:file-entry manifest:full-path="Pictures/1000000000000556000002D0565569D1.png" manifest:media-type="image/png"/>
  <manifest:file-entry manifest:full-path="Pictures/1000000000000556000002D0EB089375.png" manifest:media-type="image/png"/>
  <manifest:file-entry manifest:full-path="Pictures/1000000000000556000002D024EBA4EF.png" manifest:media-type="image/png"/>
  <manifest:file-entry manifest:full-path="Pictures/1000000000000556000002D09B7B2929.png" manifest:media-type="image/png"/>
  <manifest:file-entry manifest:full-path="Pictures/1000000000000556000002D091F3060D.png" manifest:media-type="image/png"/>
  <manifest:file-entry manifest:full-path="Pictures/1000000000000780000004680855D00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24" style:family="table">
      <style:table-properties style:width="16.96cm" fo:margin-left="-0.707cm" fo:margin-top="0cm" fo:margin-bottom="0cm" table:align="left" style:writing-mode="page"/>
    </style:style>
    <style:style style:name="Tabla24.A" style:family="table-column">
      <style:table-column-properties style:column-width="3.205cm"/>
    </style:style>
    <style:style style:name="Tabla24.B" style:family="table-column">
      <style:table-column-properties style:column-width="13.755cm"/>
    </style:style>
    <style:style style:name="Tabla24.1" style:family="table-row">
      <style:table-row-properties style:min-row-height="0.564cm" fo:keep-together="auto"/>
    </style:style>
    <style:style style:name="Tabla2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4.A5" style:family="table-cell">
      <style:table-cell-properties fo:padding-left="0.203cm" fo:padding-right="0.203cm" fo:padding-top="0cm" fo:padding-bottom="0cm" fo:border-left="1pt solid #000000" fo:border-right="0.5pt solid #000000" fo:border-top="none" fo:border-bottom="0.5pt solid #000000"/>
    </style:style>
    <style:style style:name="Tabla24.B5" style:family="table-cell">
      <style:table-cell-properties fo:padding-left="0.203cm" fo:padding-right="0.203cm" fo:padding-top="0cm" fo:padding-bottom="0cm" fo:border-left="0.5pt solid #000000" fo:border-right="1pt solid #000000" fo:border-top="none" fo:border-bottom="0.5pt solid #000000"/>
    </style:style>
    <style:style style:name="Tabla24.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tandard">
      <style:paragraph-properties fo:margin-top="0cm" fo:margin-bottom="0cm" style:contextual-spacing="false" fo:line-height="100%"/>
      <style:text-properties officeooo:paragraph-rsid="0162be7d"/>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62be7d"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62be7d" officeooo:paragraph-rsid="0162be7d"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0c8c3c5" officeooo:paragraph-rsid="0162be7d"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62be7d" style:font-name-asian="Times New Roman1" style:language-asian="es" style:country-asian="MX" style:font-weight-asian="bold" style:font-name-complex="Times New Roman1" style:font-weight-complex="bold"/>
    </style:style>
    <style:style style:name="P297" style:family="paragraph" style:parent-style-name="Standard">
      <style:paragraph-properties fo:margin-top="0cm" fo:margin-bottom="0cm" style:contextual-spacing="false" fo:line-height="100%"/>
      <style:text-properties style:font-name="Times New Roman" fo:font-size="12pt" officeooo:rsid="003e84ab" officeooo:paragraph-rsid="0162be7d" style:font-name-asian="Times New Roman1" style:font-size-asian="12pt" style:language-asian="es" style:country-asian="MX" style:font-name-complex="Times New Roman1" style:font-size-complex="12pt"/>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630cf2" officeooo:paragraph-rsid="01630cf2"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5">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officeooo:rsid="0166d075" officeooo:paragraph-rsid="0166d075" style:font-name-asian="Times New Roman1" style:font-size-asian="12pt" style:language-asian="es" style:country-asian="MX" style:font-name-complex="Times New Roman1" style:font-size-complex="12pt"/>
    </style:style>
    <style:style style:name="P305" style:family="paragraph" style:parent-style-name="Standard">
      <style:paragraph-properties fo:margin-top="0cm" fo:margin-bottom="0cm" style:contextual-spacing="false" fo:line-height="100%"/>
      <style:text-properties officeooo:rsid="00c5a4eb" officeooo:paragraph-rsid="0162be7d"/>
    </style:style>
    <style:style style:name="P306" style:family="paragraph" style:parent-style-name="Standard">
      <style:paragraph-properties fo:margin-top="0cm" fo:margin-bottom="0cm" style:contextual-spacing="false" fo:line-height="100%"/>
      <style:text-properties officeooo:rsid="00377f24" officeooo:paragraph-rsid="0162be7d"/>
    </style:style>
    <style:style style:name="P307" style:family="paragraph" style:parent-style-name="Standard">
      <style:text-properties officeooo:rsid="0029d1b4" officeooo:paragraph-rsid="0162be7d"/>
    </style:style>
    <style:style style:name="P308" style:family="paragraph" style:parent-style-name="Subtitulo_20_ES">
      <style:text-properties officeooo:paragraph-rsid="010c30f1"/>
    </style:style>
    <style:style style:name="P309" style:family="paragraph" style:parent-style-name="Standard">
      <style:paragraph-properties fo:margin-top="0cm" fo:margin-bottom="0cm" style:contextual-spacing="false" fo:line-height="100%"/>
      <style:text-properties officeooo:paragraph-rsid="010c30f1"/>
    </style:style>
    <style:style style:name="P310"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311"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312"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313" style:family="paragraph" style:parent-style-name="Standard" style:list-style-name="L66">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6">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6">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67">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list-style-name="L67">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9" style:family="paragraph" style:parent-style-name="Standard" style:list-style-name="L67">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0"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1" style:family="paragraph" style:parent-style-name="Standard" style:list-style-name="L68">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2" style:family="paragraph" style:parent-style-name="Standard" style:list-style-name="L68">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3"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4" style:family="paragraph" style:parent-style-name="Standard" style:list-style-name="L69">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5" style:family="paragraph" style:parent-style-name="Standard" style:list-style-name="L70">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6" style:family="paragraph" style:parent-style-name="Standard" style:list-style-name="L70">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27" style:family="paragraph" style:parent-style-name="Standard" style:list-style-name="L70">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3">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35" style:family="paragraph" style:parent-style-name="Standard">
      <style:paragraph-properties fo:margin-top="0cm" fo:margin-bottom="0cm" style:contextual-spacing="false" fo:line-height="100%"/>
      <style:text-properties officeooo:rsid="00c5a4eb" officeooo:paragraph-rsid="010c30f1"/>
    </style:style>
    <style:style style:name="P336" style:family="paragraph" style:parent-style-name="Standard">
      <style:paragraph-properties fo:margin-top="0cm" fo:margin-bottom="0cm" style:contextual-spacing="false" fo:line-height="100%"/>
      <style:text-properties officeooo:rsid="00377f24" officeooo:paragraph-rsid="010c30f1"/>
    </style:style>
    <style:style style:name="P337" style:family="paragraph" style:parent-style-name="Standard">
      <style:text-properties officeooo:paragraph-rsid="010c30f1"/>
    </style:style>
    <style:style style:name="P338" style:family="paragraph" style:parent-style-name="Standard">
      <style:paragraph-properties fo:break-before="page"/>
      <style:text-properties officeooo:paragraph-rsid="010c30f1"/>
    </style:style>
    <style:style style:name="P339" style:family="paragraph" style:parent-style-name="Subtitulo_20_ES">
      <style:text-properties officeooo:paragraph-rsid="01194346"/>
    </style:style>
    <style:style style:name="P340" style:family="paragraph" style:parent-style-name="Standard">
      <style:paragraph-properties fo:margin-top="0cm" fo:margin-bottom="0cm" style:contextual-spacing="false" fo:line-height="100%"/>
      <style:text-properties officeooo:paragraph-rsid="011a1123"/>
    </style:style>
    <style:style style:name="P341"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42"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43"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44"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45" style:family="paragraph" style:parent-style-name="Standard" style:list-style-name="L74">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4">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list-style-name="L74">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5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6"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5"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6"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7"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8" style:family="paragraph" style:parent-style-name="Standard" style:list-style-name="L80">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9"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70" style:family="paragraph" style:parent-style-name="Standard">
      <style:paragraph-properties fo:margin-top="0cm" fo:margin-bottom="0cm" style:contextual-spacing="false" fo:line-height="100%"/>
      <style:text-properties officeooo:rsid="00c5a4eb" officeooo:paragraph-rsid="011a1123"/>
    </style:style>
    <style:style style:name="P371" style:family="paragraph" style:parent-style-name="Standard">
      <style:paragraph-properties fo:margin-top="0cm" fo:margin-bottom="0cm" style:contextual-spacing="false" fo:line-height="100%"/>
      <style:text-properties officeooo:rsid="00377f24" officeooo:paragraph-rsid="011a1123"/>
    </style:style>
    <style:style style:name="P372" style:family="paragraph" style:parent-style-name="Standard">
      <style:text-properties officeooo:paragraph-rsid="011a1123"/>
    </style:style>
    <style:style style:name="P373"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74" style:family="paragraph" style:parent-style-name="Standard" style:list-style-name="L81">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6" style:family="paragraph" style:parent-style-name="Standard" style:list-style-name="L82">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7"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8" style:family="paragraph" style:parent-style-name="Texto_20_ES">
      <style:paragraph-properties fo:break-before="page"/>
    </style:style>
    <style:style style:name="P379" style:family="paragraph" style:parent-style-name="Subtitulo_20_ES">
      <style:text-properties officeooo:rsid="00dfae1b" officeooo:paragraph-rsid="00dfae1b"/>
    </style:style>
    <style:style style:name="P380" style:family="paragraph" style:parent-style-name="Subtitulo_20_ES">
      <style:text-properties officeooo:rsid="00dfae1b" officeooo:paragraph-rsid="00e1924f"/>
    </style:style>
    <style:style style:name="P381" style:family="paragraph" style:parent-style-name="Subsubtitulo_20_ES">
      <style:text-properties officeooo:rsid="00e30c86" officeooo:paragraph-rsid="00e546b1"/>
    </style:style>
    <style:style style:name="P382" style:family="paragraph" style:parent-style-name="Texto_20_ES">
      <style:text-properties officeooo:paragraph-rsid="015c82ba"/>
    </style:style>
    <style:style style:name="P383" style:family="paragraph" style:parent-style-name="Subsubtitulo_20_ES">
      <style:text-properties officeooo:rsid="00e30c86" officeooo:paragraph-rsid="00e66586"/>
    </style:style>
    <style:style style:name="P384" style:family="paragraph" style:parent-style-name="Subtitulo_20_ES">
      <style:text-properties officeooo:rsid="00dfae1b" officeooo:paragraph-rsid="015ff5b6"/>
    </style:style>
    <style:style style:name="P385" style:family="paragraph" style:parent-style-name="Subsubtitulo_20_ES">
      <style:text-properties officeooo:rsid="00e30c86" officeooo:paragraph-rsid="015c82ba"/>
    </style:style>
    <style:style style:name="P386" style:family="paragraph" style:parent-style-name="Subtitulo_20_ES">
      <style:text-properties officeooo:paragraph-rsid="015d2858"/>
    </style:style>
    <style:style style:name="P387" style:family="paragraph" style:parent-style-name="Subsubtitulo_20_ES">
      <style:text-properties officeooo:rsid="00e30c86" officeooo:paragraph-rsid="015d2858"/>
    </style:style>
    <style:style style:name="P388" style:family="paragraph" style:parent-style-name="Subsubtitulo_20_ES">
      <style:text-properties officeooo:rsid="00e30c86" officeooo:paragraph-rsid="015e0702"/>
    </style:style>
    <style:style style:name="P389" style:family="paragraph" style:parent-style-name="Subtitulo_20_ES">
      <style:text-properties officeooo:paragraph-rsid="00e28d8c"/>
    </style:style>
    <style:style style:name="P390" style:family="paragraph" style:parent-style-name="Subsubtitulo_20_ES">
      <style:text-properties officeooo:rsid="00e30c86" officeooo:paragraph-rsid="00e30c86"/>
    </style:style>
    <style:style style:name="P391" style:family="paragraph" style:parent-style-name="Texto_20_ES">
      <style:text-properties officeooo:paragraph-rsid="00e44b38"/>
    </style:style>
    <style:style style:name="P392" style:family="paragraph" style:parent-style-name="Subsubtitulo_20_ES">
      <style:text-properties officeooo:rsid="00e30c86" officeooo:paragraph-rsid="00e44b38"/>
    </style:style>
    <style:style style:name="P393" style:family="paragraph" style:parent-style-name="Subsubtitulo_20_ES">
      <style:text-properties officeooo:rsid="00e30c86" officeooo:paragraph-rsid="00e4929c"/>
    </style:style>
    <style:style style:name="P394" style:family="paragraph" style:parent-style-name="Texto_20_ES">
      <style:text-properties officeooo:paragraph-rsid="00f66560"/>
    </style:style>
    <style:style style:name="P395" style:family="paragraph" style:parent-style-name="Subtitulo_20_ES">
      <style:text-properties officeooo:paragraph-rsid="00e76891"/>
    </style:style>
    <style:style style:name="P396" style:family="paragraph" style:parent-style-name="Subsubtitulo_20_ES">
      <style:text-properties officeooo:rsid="00e30c86" officeooo:paragraph-rsid="00e7f011"/>
    </style:style>
    <style:style style:name="P397" style:family="paragraph" style:parent-style-name="Subsubtitulo_20_ES">
      <style:text-properties officeooo:rsid="00e30c86" officeooo:paragraph-rsid="01702898"/>
    </style:style>
    <style:style style:name="P398"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17133c4"/>
    </style:style>
    <style:style style:name="T120" style:family="text">
      <style:text-properties officeooo:rsid="0081e7b2"/>
    </style:style>
    <style:style style:name="T121" style:family="text">
      <style:text-properties officeooo:rsid="008d1d0c"/>
    </style:style>
    <style:style style:name="T122" style:family="text">
      <style:text-properties officeooo:rsid="009da15a"/>
    </style:style>
    <style:style style:name="T123" style:family="text">
      <style:text-properties officeooo:rsid="009e1b74"/>
    </style:style>
    <style:style style:name="T124" style:family="text">
      <style:text-properties officeooo:rsid="00844eeb"/>
    </style:style>
    <style:style style:name="T125" style:family="text">
      <style:text-properties officeooo:rsid="009536d4"/>
    </style:style>
    <style:style style:name="T126" style:family="text">
      <style:text-properties officeooo:rsid="0096c281"/>
    </style:style>
    <style:style style:name="T127" style:family="text">
      <style:text-properties officeooo:rsid="009195ee"/>
    </style:style>
    <style:style style:name="T128" style:family="text">
      <style:text-properties fo:font-style="italic" officeooo:rsid="009195ee" style:font-style-asian="italic" style:font-style-complex="italic"/>
    </style:style>
    <style:style style:name="T129" style:family="text">
      <style:text-properties officeooo:rsid="00973403"/>
    </style:style>
    <style:style style:name="T130"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1" style:family="text">
      <style:text-properties officeooo:rsid="00bd0b7c"/>
    </style:style>
    <style:style style:name="T132" style:family="text">
      <style:text-properties officeooo:rsid="00b17ea0"/>
    </style:style>
    <style:style style:name="T133" style:family="text">
      <style:text-properties officeooo:rsid="00bf7924"/>
    </style:style>
    <style:style style:name="T134" style:family="text">
      <style:text-properties officeooo:rsid="00aac833"/>
    </style:style>
    <style:style style:name="T135" style:family="text">
      <style:text-properties officeooo:rsid="00a166a5"/>
    </style:style>
    <style:style style:name="T136" style:family="text">
      <style:text-properties officeooo:rsid="00a2833f"/>
    </style:style>
    <style:style style:name="T137" style:family="text">
      <style:text-properties fo:font-style="italic" officeooo:rsid="00a2833f" style:font-style-asian="italic" style:font-style-complex="italic"/>
    </style:style>
    <style:style style:name="T138" style:family="text">
      <style:text-properties fo:font-style="italic" officeooo:rsid="00a166a5" style:font-style-asian="italic" style:font-style-complex="italic"/>
    </style:style>
    <style:style style:name="T139" style:family="text">
      <style:text-properties officeooo:rsid="00a6d0f2"/>
    </style:style>
    <style:style style:name="T140" style:family="text">
      <style:text-properties officeooo:rsid="00ac6dd6"/>
    </style:style>
    <style:style style:name="T141" style:family="text">
      <style:text-properties fo:font-style="italic" officeooo:rsid="00a44b25" style:font-style-asian="italic" style:font-style-complex="italic"/>
    </style:style>
    <style:style style:name="T142" style:family="text">
      <style:text-properties officeooo:rsid="00a44b25"/>
    </style:style>
    <style:style style:name="T143" style:family="text">
      <style:text-properties officeooo:rsid="00a970f7"/>
    </style:style>
    <style:style style:name="T144" style:family="text">
      <style:text-properties officeooo:rsid="00a8c8de"/>
    </style:style>
    <style:style style:name="T145" style:family="text">
      <style:text-properties officeooo:rsid="00b43c59"/>
    </style:style>
    <style:style style:name="T146" style:family="text">
      <style:text-properties officeooo:rsid="00b6deba"/>
    </style:style>
    <style:style style:name="T147" style:family="text">
      <style:text-properties officeooo:rsid="00a6ec99"/>
    </style:style>
    <style:style style:name="T148" style:family="text">
      <style:text-properties officeooo:rsid="00b56b05"/>
    </style:style>
    <style:style style:name="T149" style:family="text">
      <style:text-properties officeooo:rsid="00bff436"/>
    </style:style>
    <style:style style:name="T150" style:family="text">
      <style:text-properties officeooo:rsid="00c54e65"/>
    </style:style>
    <style:style style:name="T151" style:family="text">
      <style:text-properties officeooo:rsid="00cb5141"/>
    </style:style>
    <style:style style:name="T152" style:family="text">
      <style:text-properties officeooo:rsid="00d3ded0"/>
    </style:style>
    <style:style style:name="T153" style:family="text">
      <style:text-properties officeooo:rsid="00c8c3c5"/>
    </style:style>
    <style:style style:name="T154" style:family="text">
      <style:text-properties officeooo:rsid="00d5716f"/>
    </style:style>
    <style:style style:name="T155" style:family="text">
      <style:text-properties officeooo:rsid="00cc7e89"/>
    </style:style>
    <style:style style:name="T156" style:family="text">
      <style:text-properties officeooo:rsid="00cddaa7"/>
    </style:style>
    <style:style style:name="T157" style:family="text">
      <style:text-properties officeooo:rsid="01569046"/>
    </style:style>
    <style:style style:name="T158" style:family="text">
      <style:text-properties officeooo:rsid="00d76835"/>
    </style:style>
    <style:style style:name="T159" style:family="text">
      <style:text-properties officeooo:rsid="00fbd78e"/>
    </style:style>
    <style:style style:name="T160" style:family="text">
      <style:text-properties officeooo:rsid="00fdc594"/>
    </style:style>
    <style:style style:name="T161" style:family="text">
      <style:text-properties officeooo:rsid="00fefbc5"/>
    </style:style>
    <style:style style:name="T162" style:family="text">
      <style:text-properties officeooo:rsid="00ffe064"/>
    </style:style>
    <style:style style:name="T163" style:family="text">
      <style:text-properties officeooo:rsid="0100228c"/>
    </style:style>
    <style:style style:name="T164" style:family="text">
      <style:text-properties officeooo:rsid="01579f19"/>
    </style:style>
    <style:style style:name="T165" style:family="text">
      <style:text-properties officeooo:rsid="01584b6f"/>
    </style:style>
    <style:style style:name="T166" style:family="text">
      <style:text-properties officeooo:rsid="01017692"/>
    </style:style>
    <style:style style:name="T167" style:family="text">
      <style:text-properties officeooo:rsid="010246d6"/>
    </style:style>
    <style:style style:name="T168" style:family="text">
      <style:text-properties officeooo:rsid="0103f99a"/>
    </style:style>
    <style:style style:name="T169" style:family="text">
      <style:text-properties officeooo:rsid="0108649f"/>
    </style:style>
    <style:style style:name="T170" style:family="text">
      <style:text-properties officeooo:rsid="0158e120"/>
    </style:style>
    <style:style style:name="T171" style:family="text">
      <style:text-properties officeooo:rsid="01076d61"/>
    </style:style>
    <style:style style:name="T172" style:family="text">
      <style:text-properties officeooo:rsid="010a295b"/>
    </style:style>
    <style:style style:name="T173" style:family="text">
      <style:text-properties officeooo:rsid="0162be7d"/>
    </style:style>
    <style:style style:name="T174" style:family="text">
      <style:text-properties officeooo:rsid="0167337f"/>
    </style:style>
    <style:style style:name="T175" style:family="text">
      <style:text-properties officeooo:rsid="01656d18"/>
    </style:style>
    <style:style style:name="T176" style:family="text">
      <style:text-properties officeooo:rsid="0164632a"/>
    </style:style>
    <style:style style:name="T177" style:family="text">
      <style:text-properties fo:font-style="italic" officeooo:rsid="0164632a" style:font-style-asian="italic" style:font-style-complex="italic"/>
    </style:style>
    <style:style style:name="T178" style:family="text">
      <style:text-properties officeooo:rsid="016fb053"/>
    </style:style>
    <style:style style:name="T179" style:family="text">
      <style:text-properties officeooo:rsid="016d59d9"/>
    </style:style>
    <style:style style:name="T180" style:family="text">
      <style:text-properties fo:font-style="italic" officeooo:rsid="016d59d9" style:font-style-asian="italic" style:font-style-complex="italic"/>
    </style:style>
    <style:style style:name="T181" style:family="text">
      <style:text-properties officeooo:rsid="016ee632"/>
    </style:style>
    <style:style style:name="T182" style:family="text">
      <style:text-properties officeooo:rsid="01681f3d"/>
    </style:style>
    <style:style style:name="T183" style:family="text">
      <style:text-properties officeooo:rsid="016a1672"/>
    </style:style>
    <style:style style:name="T184" style:family="text">
      <style:text-properties officeooo:rsid="010c30f1"/>
    </style:style>
    <style:style style:name="T185" style:family="text">
      <style:text-properties officeooo:rsid="010c8a27"/>
    </style:style>
    <style:style style:name="T186" style:family="text">
      <style:text-properties officeooo:rsid="010dfcbb"/>
    </style:style>
    <style:style style:name="T187" style:family="text">
      <style:text-properties fo:font-style="italic" officeooo:rsid="010c8a27" style:font-style-asian="italic" style:font-style-complex="italic"/>
    </style:style>
    <style:style style:name="T188" style:family="text">
      <style:text-properties officeooo:rsid="010e40bb"/>
    </style:style>
    <style:style style:name="T189" style:family="text">
      <style:text-properties officeooo:rsid="01185e4f"/>
    </style:style>
    <style:style style:name="T190" style:family="text">
      <style:text-properties officeooo:rsid="010e97aa"/>
    </style:style>
    <style:style style:name="T191" style:family="text">
      <style:text-properties fo:font-style="italic" officeooo:rsid="010dfcbb" style:font-style-asian="italic" style:font-style-complex="italic"/>
    </style:style>
    <style:style style:name="T192" style:family="text">
      <style:text-properties fo:font-style="normal" officeooo:rsid="010e40bb" style:font-style-asian="normal" style:font-style-complex="normal"/>
    </style:style>
    <style:style style:name="T193" style:family="text">
      <style:text-properties style:text-underline-style="none" officeooo:rsid="0018fbfa"/>
    </style:style>
    <style:style style:name="T194" style:family="text">
      <style:text-properties style:text-underline-style="none" officeooo:rsid="005810e6"/>
    </style:style>
    <style:style style:name="T195" style:family="text">
      <style:text-properties style:text-underline-style="none" officeooo:rsid="010e40bb"/>
    </style:style>
    <style:style style:name="T196" style:family="text">
      <style:text-properties officeooo:rsid="01106f8f"/>
    </style:style>
    <style:style style:name="T197" style:family="text">
      <style:text-properties style:text-underline-style="none" officeooo:rsid="00c193e8"/>
    </style:style>
    <style:style style:name="T198" style:family="text">
      <style:text-properties officeooo:rsid="01194346"/>
    </style:style>
    <style:style style:name="T199" style:family="text">
      <style:text-properties officeooo:rsid="011a1123"/>
    </style:style>
    <style:style style:name="T200" style:family="text">
      <style:text-properties officeooo:rsid="011c907c"/>
    </style:style>
    <style:style style:name="T201" style:family="text">
      <style:text-properties officeooo:rsid="012ab762"/>
    </style:style>
    <style:style style:name="T202" style:family="text">
      <style:text-properties officeooo:rsid="013e66f3"/>
    </style:style>
    <style:style style:name="T203" style:family="text">
      <style:text-properties officeooo:rsid="01525885"/>
    </style:style>
    <style:style style:name="T204" style:family="text">
      <style:text-properties officeooo:rsid="01208a0f"/>
    </style:style>
    <style:style style:name="T205" style:family="text">
      <style:text-properties fo:font-style="italic" officeooo:rsid="01208a0f" style:font-style-asian="italic" style:font-style-complex="italic"/>
    </style:style>
    <style:style style:name="T206" style:family="text">
      <style:text-properties officeooo:rsid="014cd721"/>
    </style:style>
    <style:style style:name="T207" style:family="text">
      <style:text-properties officeooo:rsid="01251c69"/>
    </style:style>
    <style:style style:name="T208" style:family="text">
      <style:text-properties fo:font-style="italic" officeooo:rsid="01251c69" style:font-style-asian="italic" style:font-style-complex="italic"/>
    </style:style>
    <style:style style:name="T209" style:family="text">
      <style:text-properties officeooo:rsid="013e7459"/>
    </style:style>
    <style:style style:name="T210" style:family="text">
      <style:text-properties officeooo:rsid="0127e809"/>
    </style:style>
    <style:style style:name="T211" style:family="text">
      <style:text-properties officeooo:rsid="0153c0c5"/>
    </style:style>
    <style:style style:name="T212" style:family="text">
      <style:text-properties officeooo:rsid="012ec50f"/>
    </style:style>
    <style:style style:name="T213" style:family="text">
      <style:text-properties officeooo:rsid="0129ab55"/>
    </style:style>
    <style:style style:name="T214" style:family="text">
      <style:text-properties officeooo:rsid="0135597c"/>
    </style:style>
    <style:style style:name="T215" style:family="text">
      <style:text-properties fo:font-style="italic" officeooo:rsid="0129ab55" style:font-style-asian="italic" style:font-style-complex="italic"/>
    </style:style>
    <style:style style:name="T216" style:family="text">
      <style:text-properties officeooo:rsid="01443860"/>
    </style:style>
    <style:style style:name="T217" style:family="text">
      <style:text-properties officeooo:rsid="01504b18"/>
    </style:style>
    <style:style style:name="T218" style:family="text">
      <style:text-properties officeooo:rsid="01324b50"/>
    </style:style>
    <style:style style:name="T219" style:family="text">
      <style:text-properties officeooo:rsid="015228fc"/>
    </style:style>
    <style:style style:name="T220" style:family="text">
      <style:text-properties fo:font-style="italic" officeooo:rsid="015228fc" style:font-style-asian="italic" style:font-style-complex="italic"/>
    </style:style>
    <style:style style:name="T221" style:family="text">
      <style:text-properties officeooo:rsid="013bd156"/>
    </style:style>
    <style:style style:name="T222" style:family="text">
      <style:text-properties officeooo:rsid="00e1924f"/>
    </style:style>
    <style:style style:name="T223" style:family="text">
      <style:text-properties officeooo:rsid="00e546b1"/>
    </style:style>
    <style:style style:name="T224" style:family="text">
      <style:text-properties officeooo:rsid="00e66586"/>
    </style:style>
    <style:style style:name="T225" style:family="text">
      <style:text-properties officeooo:rsid="015ff5b6"/>
    </style:style>
    <style:style style:name="T226" style:family="text">
      <style:text-properties officeooo:rsid="015c82ba"/>
    </style:style>
    <style:style style:name="T227" style:family="text">
      <style:text-properties officeooo:rsid="00dfae1b"/>
    </style:style>
    <style:style style:name="T228" style:family="text">
      <style:text-properties officeooo:rsid="015d2858"/>
    </style:style>
    <style:style style:name="T229" style:family="text">
      <style:text-properties officeooo:rsid="015e0702"/>
    </style:style>
    <style:style style:name="T230" style:family="text">
      <style:text-properties officeooo:rsid="00e28d8c"/>
    </style:style>
    <style:style style:name="T231" style:family="text">
      <style:text-properties officeooo:rsid="00e44b38"/>
    </style:style>
    <style:style style:name="T232" style:family="text">
      <style:text-properties officeooo:rsid="00e4929c"/>
    </style:style>
    <style:style style:name="T233" style:family="text">
      <style:text-properties officeooo:rsid="00e7f011"/>
    </style:style>
    <style:style style:name="T234" style:family="text">
      <style:text-properties officeooo:rsid="00e76891"/>
    </style:style>
    <style:style style:name="T235" style:family="text">
      <style:text-properties officeooo:rsid="017028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office:name="1. Introducción" text:style-name="Index_20_Link" text:visited-style-name="Index_20_Link">1. Introducción<text:tab/>1</text:a></text:p>
          <text:p text:style-name="P7"><text:a xlink:type="simple" xlink:href="#__RefHeading___Toc351_683736245" office:name="2. Propósito" text:style-name="Index_20_Link" text:visited-style-name="Index_20_Link">2. Propósito<text:tab/>1</text:a></text:p>
          <text:p text:style-name="P7"><text:a xlink:type="simple" xlink:href="#__RefHeading___Toc349_683736245" office:name="3. Requerimientos funcionales" text:style-name="Index_20_Link" text:visited-style-name="Index_20_Link">3. Requerimientos funcionales<text:tab/>1</text:a></text:p>
          <text:p text:style-name="P7"><text:a xlink:type="simple" xlink:href="#__RefHeading___Toc347_683736245" office:name="4. Atributos de calidad" text:style-name="Index_20_Link" text:visited-style-name="Index_20_Link">4. Atributos de calidad<text:tab/>2</text:a></text:p>
          <text:p text:style-name="P7"><text:a xlink:type="simple" xlink:href="#__RefHeading___Toc345_683736245" office:name="5. Diagramas UML" text:style-name="Index_20_Link" text:visited-style-name="Index_20_Link">5. Diagramas UML<text:tab/>2</text:a></text:p>
          <text:p text:style-name="P8"><text:a xlink:type="simple" xlink:href="#__RefHeading___Toc355_683736245" office:name="5.1 Diagrama Entidad – Relación" text:style-name="Index_20_Link" text:visited-style-name="Index_20_Link">5.1 Diagrama Entidad – Relación<text:tab/>2</text:a></text:p>
          <text:p text:style-name="P8"><text:a xlink:type="simple" xlink:href="#__RefHeading___Toc355_683736245%20Copia%201" office:name="5.2 Diagrama Entidad – Conversión a tablas" text:style-name="Index_20_Link" text:visited-style-name="Index_20_Link">5.2 Diagrama Entidad – Conversión a tablas<text:tab/>3</text:a></text:p>
          <text:p text:style-name="P8"><text:a xlink:type="simple" xlink:href="#__RefHeading___Toc357_683736245" office:name="5.3 Diagrama de clases del dominio" text:style-name="Index_20_Link" text:visited-style-name="Index_20_Link">5.3 Diagrama de clases del dominio<text:tab/>4</text:a></text:p>
          <text:p text:style-name="P7"><text:a xlink:type="simple" xlink:href="#__RefHeading___Toc4971_1315340498" office:name="6. Modelo de casos de uso" text:style-name="Index_20_Link" text:visited-style-name="Index_20_Link">6. Modelo de casos de uso<text:tab/>4</text:a></text:p>
          <text:p text:style-name="P8"><text:a xlink:type="simple" xlink:href="#__RefHeading___Toc2577_15024945" office:name="6.1 Paquete de casos de uso – User" text:style-name="Index_20_Link" text:visited-style-name="Index_20_Link">6.1 Paquete de casos de uso – User<text:tab/>5</text:a></text:p>
          <text:p text:style-name="P8"><text:a xlink:type="simple" xlink:href="#__RefHeading___Toc2575_15024945" office:name="6.2 Paquete de casos de uso – Inventory" text:style-name="Index_20_Link" text:visited-style-name="Index_20_Link">6.2 Paquete de casos de uso – Inventory<text:tab/>7</text:a></text:p>
          <text:p text:style-name="P8"><text:a xlink:type="simple" xlink:href="#__RefHeading___Toc2573_15024945" office:name="6.3 Paquete de casos de uso – Sales" text:style-name="Index_20_Link" text:visited-style-name="Index_20_Link">6.3 Paquete de casos de uso – Sales<text:tab/>12</text:a></text:p>
          <text:p text:style-name="P8"><text:a xlink:type="simple" xlink:href="#__RefHeading___Toc2571_15024945" office:name="6.3 Paquete de casos de uso – Shop administration" text:style-name="Index_20_Link" text:visited-style-name="Index_20_Link">6.3 Paquete de casos de uso – Shop administration<text:tab/>16</text:a></text:p>
          <text:p text:style-name="P8"><text:a xlink:type="simple" xlink:href="#__RefHeading___Toc2571_15024945%20Copia%201" office:name="6.4 Paquete de casos de uso – Egresses" text:style-name="Index_20_Link" text:visited-style-name="Index_20_Link">6.4 Paquete de casos de uso – Egresses<text:tab/>23</text:a></text:p>
          <text:p text:style-name="P8"><text:a xlink:type="simple" xlink:href="#__RefHeading___Toc2571_15024945%20Copia%201%20Copia%201" office:name="6.5 Paquete de casos de uso – Cotizations" text:style-name="Index_20_Link" text:visited-style-name="Index_20_Link">6.5 Paquete de casos de uso – Cotizations<text:tab/>26</text:a></text:p>
          <text:p text:style-name="P7"><text:a xlink:type="simple" xlink:href="#__RefHeading___Toc343_683736245" office:name="6. Interfaz de usuario" text:style-name="Index_20_Link" text:visited-style-name="Index_20_Link">6. Interfaz de usuario<text:tab/>29</text:a></text:p>
          <text:p text:style-name="P8"><text:a xlink:type="simple" xlink:href="#__RefHeading___Toc2849_660783722" office:name="6.1 Pantalla - Primer uso" text:style-name="Index_20_Link" text:visited-style-name="Index_20_Link">6.1 Pantalla - Primer uso<text:tab/>29</text:a></text:p>
          <text:p text:style-name="P8"><text:a xlink:type="simple" xlink:href="#__RefHeading___Toc2847_660783722" office:name="6.2 Pantalla – Login" text:style-name="Index_20_Link" text:visited-style-name="Index_20_Link">6.2 Pantalla – Login<text:tab/>29</text:a></text:p>
          <text:p text:style-name="P8"><text:a xlink:type="simple" xlink:href="#__RefHeading___Toc2845_660783722" office:name="6.3 Pantalla – Nueva venta" text:style-name="Index_20_Link" text:visited-style-name="Index_20_Link">6.3 Pantalla – Nueva venta<text:tab/>30</text:a></text:p>
          <text:p text:style-name="P9"><text:a xlink:type="simple" xlink:href="#__RefHeading___Toc2851_660783722" office:name="6.3.1 Pantalla – Consultar ventas" text:style-name="Index_20_Link" text:visited-style-name="Index_20_Link">6.3.1 Pantalla – Consultar ventas<text:tab/>30</text:a></text:p>
          <text:p text:style-name="P9"><text:a xlink:type="simple" xlink:href="#__RefHeading___Toc2867_660783722" office:name="6.3.2 Pantalla – Corte de caja" text:style-name="Index_20_Link" text:visited-style-name="Index_20_Link">6.3.2 Pantalla – Corte de caja<text:tab/>31</text:a></text:p>
          <text:p text:style-name="P8"><text:a xlink:type="simple" xlink:href="#__RefHeading___Toc2853_660783722%20Copia%201" office:name="6.4 Pantalla – Egresos" text:style-name="Index_20_Link" text:visited-style-name="Index_20_Link">6.4 Pantalla – Egresos<text:tab/>31</text:a></text:p>
          <text:p text:style-name="P9"><text:a xlink:type="simple" xlink:href="#__RefHeading___Toc2867_660783722%20Copia%201" office:name="6.4.1 Pantalla – Nuevo egreso" text:style-name="Index_20_Link" text:visited-style-name="Index_20_Link">6.4.1 Pantalla – Nuevo egreso<text:tab/>32</text:a></text:p>
          <text:p text:style-name="P8"><text:a xlink:type="simple" xlink:href="#__RefHeading___Toc2843_660783722%20Copia%201" office:name="6.5 Pantalla – Cotizaciones" text:style-name="Index_20_Link" text:visited-style-name="Index_20_Link">6.5 Pantalla – Cotizaciones<text:tab/>32</text:a></text:p>
          <text:p text:style-name="P9"><text:a xlink:type="simple" xlink:href="#__RefHeading___Toc2867_660783722%20Copia%202" office:name="6.5.1 Pantalla – Nueva cotización" text:style-name="Index_20_Link" text:visited-style-name="Index_20_Link">6.5.1 Pantalla – Nueva cotización<text:tab/>33</text:a></text:p>
          <text:p text:style-name="P9"><text:a xlink:type="simple" xlink:href="#__RefHeading___Toc2867_660783722%20Copia%202%20Copia%201" office:name="6.5.2 Pantalla – Cotización PDF" text:style-name="Index_20_Link" text:visited-style-name="Index_20_Link">6.5.2 Pantalla – Cotización PDF<text:tab/>33</text:a></text:p>
          <text:p text:style-name="P8"><text:a xlink:type="simple" xlink:href="#__RefHeading___Toc2843_660783722" office:name="6.6 Pantalla – Inventario" text:style-name="Index_20_Link" text:visited-style-name="Index_20_Link">6.6 Pantalla – Inventario<text:tab/>34</text:a></text:p>
          <text:p text:style-name="P9"><text:a xlink:type="simple" xlink:href="#__RefHeading___Toc2865_660783722" office:name="6.6.1 Pantalla – Datos del producto" text:style-name="Index_20_Link" text:visited-style-name="Index_20_Link">6.6.1 Pantalla – Datos del producto<text:tab/>34</text:a></text:p>
          <text:p text:style-name="P9"><text:a xlink:type="simple" xlink:href="#__RefHeading___Toc2863_660783722" office:name="6.6.2 Pantalla – Categorías" text:style-name="Index_20_Link" text:visited-style-name="Index_20_Link"><text:soft-page-break/>6.6.2 Pantalla – Categorías<text:tab/>35</text:a></text:p>
          <text:p text:style-name="P9"><text:a xlink:type="simple" xlink:href="#__RefHeading___Toc2861_660783722" office:name="6.6.3 Pantalla – Datos de la categoría" text:style-name="Index_20_Link" text:visited-style-name="Index_20_Link">6.6.3 Pantalla – Datos de la categoría<text:tab/>35</text:a></text:p>
          <text:p text:style-name="P9"><text:a xlink:type="simple" xlink:href="#__RefHeading___Toc2859_660783722" office:name="6.6.4 Pantalla – Incrementar stock" text:style-name="Index_20_Link" text:visited-style-name="Index_20_Link">6.6.4 Pantalla – Incrementar stock<text:tab/>36</text:a></text:p>
          <text:p text:style-name="P9"><text:a xlink:type="simple" xlink:href="#__RefHeading___Toc2857_660783722" office:name="6.6.5 Pantalla – Buscar producto" text:style-name="Index_20_Link" text:visited-style-name="Index_20_Link">6.6.5 Pantalla – Buscar producto<text:tab/>36</text:a></text:p>
          <text:p text:style-name="P8"><text:a xlink:type="simple" xlink:href="#__RefHeading___Toc2841_660783722" office:name="6.7 Pantalla – Usuarios" text:style-name="Index_20_Link" text:visited-style-name="Index_20_Link">6.7 Pantalla – Usuarios<text:tab/>37</text:a></text:p>
          <text:p text:style-name="P9"><text:a xlink:type="simple" xlink:href="#__RefHeading___Toc2855_660783722" office:name="6.7.1 Pantalla – Datos del usuario" text:style-name="Index_20_Link" text:visited-style-name="Index_20_Link">6.7.1 Pantalla – Datos del usuario<text:tab/>37</text:a></text:p>
          <text:p text:style-name="P8"><text:a xlink:type="simple" xlink:href="#__RefHeading___Toc2839_660783722" office:name="6.8 Pantalla – Administración" text:style-name="Index_20_Link" text:visited-style-name="Index_20_Link">6.8 Pantalla – Administración<text:tab/>38</text:a></text:p>
          <text:p text:style-name="P9"><text:a xlink:type="simple" xlink:href="#__RefHeading___Toc2853_660783722" office:name="6.8.1 Pantalla – Cortes de caja" text:style-name="Index_20_Link" text:visited-style-name="Index_20_Link">6.8.1 Pantalla – Cortes de caja<text:tab/>39</text:a></text:p>
          <text:p text:style-name="P9"><text:a xlink:type="simple" xlink:href="#__RefHeading___Toc2853_660783722%20Copia%202" office:name="6.8.2 Pantalla – Balance" text:style-name="Index_20_Link" text:visited-style-name="Index_20_Link">6.8.2 Pantalla – Balance<text:tab/>39</text:a></text:p>
          <text:p text:style-name="P9"><text:a xlink:type="simple" xlink:href="#__RefHeading___Toc2853_660783722%20Copia%202%20Copia%201" office:name="6.8.3 Pantalla – Balance Pdf" text:style-name="Index_20_Link" text:visited-style-name="Index_20_Link">6.8.3 Pantalla – Balance Pdf<text:tab/>40</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width="15.589cm" svg:height="7.634cm" draw:z-index="31"><draw:image xlink:href="Pictures/10000000000006D6000003599082712B.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12"><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1" draw:name="Imagen7" text:anchor-type="char" svg:width="15.589cm" svg:height="5.606cm" draw:z-index="32"><draw:image xlink:href="Pictures/10000000000003A900000151A9397944.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text:span><text:span text:style-name="T119">si es efectivo</text:span> ingresa el monto pagado por el cliente, <text:span text:style-name="T119">si es por ambos, ingresa el folio de la transacción, monto pagado en la transacción y monto pagado en efectivo,</text:span> <text:span text:style-name="T120">finalmente, da clic en el botón “Pagar”</text:span>. <text:span text:style-name="T121">(ver FA</text:span><text:span text:style-name="T117">7</text:span><text:span text:style-name="T121">)</text:span></text:p>
              </text:list-item>
              <text:list-item>
                <text:p text:style-name="P174">El sistema crea un nuevo objeto <text:span text:style-name="T65">sale, </text:span><text:span text:style-name="T122">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3">establece en su campo paymentType y amountPayed los valores del tipo de pago y monto pagado respectivamente</text:span> y almacena el objeto <text:span text:style-name="T65">sale</text:span> mediante el SaleRepository, <text:span text:style-name="T124">finalmente, muestra el mensaje “Venta realizada”. </text:span><text:span text:style-name="T125">(ver EX2)</text:span></text:p>
              </text:list-item>
              <text:list-item>
                <text:p text:style-name="P175">El sistema quita la pantalla “Cobrar venta” y muestra la pantalla “Nueva venta” sin ningún <text:span text:style-name="T126">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7">si el valor unitsToSale sobrepasaría el valor del campo stock del PRODUCT (si su campo isInfinityStock es </text:span><text:soft-page-break/><text:span text:style-name="T127">true) entonces muestra el mensaje “Stock insuficiente”</text:span>.</text:p>
              </text:list-item>
              <text:list-item>
                <text:p text:style-name="P181">Regresar al paso 5 del flujo normal.</text:p>
              </text:list-item>
            </text:list>
            <text:p text:style-name="P180"/>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7">si el valor ya era 1, entonces lo elimina del arreglo </text:span><text:span text:style-name="T128">productsOfSale</text:span><text:span text:style-name="T127">.</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9">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30">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ext:p text:style-name="P154"/>
      <table:table table:name="Tabla6" table:style-name="Tabla6">
        <table:table-column table:style-name="Tabla6.A"/>
        <table:table-column table:style-name="Tabla6.B"/>
        <text:soft-page-break/>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1">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2">(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2">(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2">(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3">hop administration</text:span><text:bookmark-end text:name="__RefHeading___Toc2571_15024945"/></text:p>
      <text:p text:style-name="P209"><draw:frame draw:style-name="fr4" draw:name="Imagen6" text:anchor-type="char" svg:width="8.731cm" svg:height="11.695cm" draw:z-index="33"><draw:image xlink:href="Pictures/10000000000001EF00000297CDA77201.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1">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4">en las que en su campo userToGenerateSale contenga el nombre del usuario actual</text:span> y realiza una sumatoria de los resultados de la multiplicación de valores de los campos unitPrice y unitsSold de cada producto de cada venta, <text:span text:style-name="T135">finalmente, </text:span><text:span text:style-name="T136">lo almacena en la variable</text:span><text:span text:style-name="T137"> totalOfDay</text:span><text:span text:style-name="T136"> y</text:span><text:span text:style-name="T138"> </text:span><text:span text:style-name="T135">muestra </text:span><text:span text:style-name="T136">su valor</text:span><text:span text:style-name="T135"> en la pantalla “Corte de caja”.</text:span></text:p>
              </text:list-item>
              <text:list-item>
                <text:p text:style-name="P217">El usuario cuenta el dinero físico y lo escribe en el recuadro “Dinero físico”, <text:span text:style-name="T139">posteriormente, da clic en el botón “</text:span><text:span text:style-name="T140">Aceptar</text:span><text:span text:style-name="T139">”. (ver FA1)</text:span></text:p>
              </text:list-item>
              <text:list-item>
                <text:p text:style-name="P217"><text:soft-page-break/>El sistema <text:span text:style-name="T136">verifica que los datos del dinero físico y el valor de</text:span><text:span text:style-name="T137"> </text:span><text:span text:style-name="T141">totalOfDay</text:span><text:span text:style-name="T142"> </text:span><text:span text:style-name="T143">sean iguales,</text:span><text:span text:style-name="T65"> </text:span><text:span text:style-name="T136">c</text:span>rea un objeto CASHCLOSING y en el establece el nombre del usuario <text:span text:style-name="T144">actual</text:span>, <text:span text:style-name="T145">fecha actual, </text:span>el monto de la venta del día y el monto de dinero registrado por el usuario, posteriormente lo almacena mediante el CashClosingRepository, finalmente, muestra el mensaje “Corte de caja realizado”. <text:span text:style-name="T139">(ver FA2, </text:span><text:span text:style-name="T132">EX1</text:span><text:span text:style-name="T139">).</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9">2</text:span>. El valor del dinero físico y el totalOfDay no coinciden.</text:p>
            <text:list text:style-name="L45">
              <text:list-item>
                <text:p text:style-name="P222">El sistema<text:span text:style-name="T136"> muestra el mensaje “El dinero físico no coincide con el total de la ventas, </text:span><text:span text:style-name="T146">¿D</text:span><text:span text:style-name="T136">esea continuar?”</text:span></text:p>
              </text:list-item>
              <text:list-item>
                <text:p text:style-name="P223">El usuario da clic en “Aceptar”. <text:span text:style-name="T147">(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8">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9">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50">(</text:span><text:span text:style-name="T151">v</text:span><text:span text:style-name="T150">er FA1, </text:span><text:span text:style-name="T152">FA2</text:span><text:span text:style-name="T150">)</text:span></text:p>
              </text:list-item>
              <text:list-item>
                <text:p text:style-name="P233">El sistema muestra la pantalla “Administración”.</text:p>
              </text:list-item>
              <text:list-item>
                <text:p text:style-name="P233"><text:soft-page-break/>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3">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4">configuración</text:span>”. <text:span text:style-name="T151">(ver FA1, FA2, </text:span><text:span text:style-name="T155">FA3</text:span><text:span text:style-name="T151">)</text:span></text:p>
              </text:list-item>
              <text:list-item>
                <text:p text:style-name="P245">El sistema almacena el nuevo valor para el stock mínimo. <text:span text:style-name="T156">(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text:soft-page-break/>“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6">(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4">configuración</text:span>”.</text:p>
              </text:list-item>
              <text:list-item>
                <text:p text:style-name="P249">El sistema almacena el nuevo valor del nombre del negocio. <text:span text:style-name="T156">(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7">Lenguaje</text:span>”.</text:p>
              </text:list-item>
              <text:list-item>
                <text:p text:style-name="P252">El sistema cambia el idioma al seleccionado por el administrador <text:span text:style-name="T157">y muestra el mensaje “Se requiere reiniciar la aplicación para aplicar los cambios de idioma en todo el punto de venta”</text:span>. <text:span text:style-name="T156">(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8">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9">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9">crear un archivo de respaldo de la base de datos con el fin de </text:span><text:span text:style-name="T160">recuperar</text:span><text:span text:style-name="T159">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1">Crear respaldo</text:span>” <text:span text:style-name="T161">desde la sección “Respaldo </text:span><text:span text:style-name="T162">de la base de datos</text:span><text:span text:style-name="T161">”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ext:span><text:soft-page-break/><text:span text:style-name="T31">true.</text:span></text:p>
          </table:table-cell>
        </table:table-row>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3">ver </text:span>FA1)</text:p>
              </text:list-item>
              <text:list-item>
                <text:p text:style-name="P266">El sistema guarda el archivo pos_database_backup.sqlite en la ubicación seleccionada y muestra el mensaje “Respaldo <text:span text:style-name="T164">creado con éxito en la ruta:</text:span>” <text:span text:style-name="T164">y la ubicación que selecciono el usuario</text:span>. <text:span text:style-name="T163">(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5">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6">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9">1</text:span><text:span text:style-name="T167">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7">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7">cargar los datos de</text:span><text:span text:style-name="T159"> un archivo de respaldo de la base de datos con el fin de </text:span><text:span text:style-name="T160">recuperar</text:span><text:span text:style-name="T159"> l</text:span><text:span text:style-name="T167">a información</text:span><text:span text:style-name="T159"> almacenad</text:span><text:span text:style-name="T167">a</text:span><text:span text:style-name="T159"> en caso de </text:span><text:span text:style-name="T167">reinstalar</text:span><text:span text:style-name="T159">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8">Cargar</text:span><text:span text:style-name="T161"> respaldo</text:span>” <text:span text:style-name="T161">desde la sección “Respaldo </text:span><text:span text:style-name="T162">de la base de datos</text:span><text:span text:style-name="T161">”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9">(ver FA1)</text:span></text:p>
              </text:list-item>
              <text:list-item>
                <text:p text:style-name="P281">El sistema verifica <text:span text:style-name="T169">que el archivo tenga la extensión .sqlite y</text:span> que el esquema de la base de datos coincida con el esquema actual del sistema, posteriormente, copia el archivo en la ubicación accesible por <text:soft-page-break/>éste y lo renombra a pos_database.sqlite, finalmente, muestra el mensaje “Respaldo cargado <text:span text:style-name="T170">con éxito, la aplicación se reiniciará para aplicar los cambios</text:span>”. <text:span text:style-name="T169">(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1">Carga de respaldo</text:span> cancelado <text:span text:style-name="T170">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9">cargar</text:span> el respaldo.</text:p>
            <text:list text:style-name="L61">
              <text:list-item>
                <text:p text:style-name="P285">El sistema muestra el mensaje “Error al <text:span text:style-name="T169">cargar</text:span> el respaldo, inténtelo de nuevo”.</text:p>
              </text:list-item>
              <text:list-item>
                <text:p text:style-name="P285">El administrador da clic en “<text:span text:style-name="T169">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70">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2">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able:table table:name="Tabla24" table:style-name="Tabla24">
        <table:table-column table:style-name="Tabla24.A"/>
        <table:table-column table:style-name="Tabla24.B"/>
        <table:table-row table:style-name="Tabla24.1">
          <table:table-cell table:style-name="Tabla24.A1" office:value-type="string">
            <text:p text:style-name="P292" loext:marker-style-name="T27"><text:span text:style-name="T28">ID:</text:span></text:p>
          </table:table-cell>
          <table:table-cell table:style-name="Tabla24.B1" office:value-type="string">
            <text:p text:style-name="P293" loext:marker-style-name="T27">CU<text:span text:style-name="T159">1</text:span><text:span text:style-name="T173">5</text:span></text:p>
          </table:table-cell>
        </table:table-row>
        <table:table-row table:style-name="Tabla24.1">
          <table:table-cell table:style-name="Tabla24.A1" office:value-type="string">
            <text:p text:style-name="P292" loext:marker-style-name="T27"><text:span text:style-name="T28">Nombre:</text:span></text:p>
          </table:table-cell>
          <table:table-cell table:style-name="Tabla24.B1" office:value-type="string">
            <text:p text:style-name="P294" loext:marker-style-name="T27">View shop balance.</text:p>
          </table:table-cell>
        </table:table-row>
        <table:table-row table:style-name="Tabla24.1">
          <table:table-cell table:style-name="Tabla24.A1" office:value-type="string">
            <text:p text:style-name="P292" loext:marker-style-name="T27"><text:span text:style-name="T28">Descripción:</text:span></text:p>
          </table:table-cell>
          <table:table-cell table:style-name="Tabla24.B1" office:value-type="string">
            <text:p text:style-name="P295" loext:marker-style-name="T27">Permitirá al administrador <text:span text:style-name="T173">visualizar </text:span><text:span text:style-name="T174">de manera gráfica el total de gastos y de ventas de un tiempo determinado con el fin de supervisar la rentabilidad del negocio.</text:span></text:p>
          </table:table-cell>
        </table:table-row>
        <table:table-row table:style-name="Tabla24.1">
          <table:table-cell table:style-name="Tabla24.A1" office:value-type="string">
            <text:p text:style-name="P292" loext:marker-style-name="T27"><text:span text:style-name="T28">Actor(es):</text:span></text:p>
          </table:table-cell>
          <table:table-cell table:style-name="Tabla24.B1" office:value-type="string">
            <text:p text:style-name="P295" loext:marker-style-name="T27">Admin.</text:p>
          </table:table-cell>
        </table:table-row>
        <table:table-row table:style-name="Tabla24.1">
          <table:table-cell table:style-name="Tabla24.A5" office:value-type="string">
            <text:p text:style-name="P296">Disparador:</text:p>
          </table:table-cell>
          <table:table-cell table:style-name="Tabla24.B5" office:value-type="string">
            <text:p text:style-name="P295" loext:marker-style-name="T27">El administrador da clic en el botón “<text:span text:style-name="T173">Balances</text:span>” <text:span text:style-name="T173">desde la pantalla “Administración”.</text:span></text:p>
          </table:table-cell>
        </table:table-row>
        <table:table-row table:style-name="Tabla24.1">
          <table:table-cell table:style-name="Tabla24.A1" office:value-type="string">
            <text:p text:style-name="P292" loext:marker-style-name="T27"><text:span text:style-name="T28">Precondiciones:</text:span></text:p>
          </table:table-cell>
          <table:table-cell table:style-name="Tabla24.B1" office:value-type="string">
            <text:p text:style-name="P297" loext:marker-style-name="T27">PRE-1: <text:span text:style-name="T31">El USER autenticado debe contener en su campo isAdmin el valor de true.</text:span></text:p>
          </table:table-cell>
        </table:table-row>
        <table:table-row table:style-name="Tabla24.1">
          <table:table-cell table:style-name="Tabla24.A1" office:value-type="string">
            <text:p text:style-name="P292" loext:marker-style-name="T27"><text:span text:style-name="T28">Flujo Normal:</text:span></text:p>
          </table:table-cell>
          <table:table-cell table:style-name="Tabla24.B1" office:value-type="string">
            <text:list text:style-name="L63">
              <text:list-item>
                <text:p text:style-name="P298">El sistema muestra la pantalla “Balances”.</text:p>
              </text:list-item>
              <text:list-item>
                <text:p text:style-name="P298">El administrador selecciona un rango de fecha y da clic en “Generar gráfico del balance”. <text:span text:style-name="T175">(ver FA1)</text:span></text:p>
              </text:list-item>
              <text:list-item>
                <text:p text:style-name="P298">El sistema <text:span text:style-name="T176">recupera todos los egresos y ventas que se han realizado durante el lapso de tiempo establecido por el usuario, hace una sumatoria de cada uno y almacena el resultado en las variables </text:span><text:span text:style-name="T177">totalEgress </text:span><text:span text:style-name="T176">y </text:span><text:span text:style-name="T177">totalSale</text:span><text:span text:style-name="T176"> respectivamente, genera el gráfico correspondiente </text:span><text:span text:style-name="T178">y lo muestra</text:span><text:span text:style-name="T176">, </text:span><text:span text:style-name="T179">resta el </text:span><text:span text:style-name="T180">totalEgress</text:span><text:span text:style-name="T177"> </text:span><text:span text:style-name="T179">del totalSale </text:span><text:span text:style-name="T176">y lo</text:span><text:span text:style-name="T181">s</text:span><text:span text:style-name="T176"> </text:span><text:soft-page-break/><text:span text:style-name="T176">muestra en pantalla </text:span><text:span text:style-name="T181">en la sección “Total Ventas”, “Total Egresos” y “Saldo Neto”</text:span><text:span text:style-name="T176">, </text:span><text:span text:style-name="T182">posteriormente, muestra en pantalla dos tablas: Ventas (idVenta, fecha, totalVenta) y Egresos (idEgreso, fecha, descripcion, monto) con los datos recuperados de cada uno.</text:span><text:span text:style-name="T176"> </text:span><text:span text:style-name="T175">(ver EX1)</text:span></text:p>
              </text:list-item>
              <text:list-item>
                <text:p text:style-name="P299">Fin del caso de uso.</text:p>
              </text:list-item>
            </text:list>
          </table:table-cell>
        </table:table-row>
        <table:table-row table:style-name="Tabla24.1">
          <table:table-cell table:style-name="Tabla24.A1" office:value-type="string">
            <text:p text:style-name="P292" loext:marker-style-name="T27"><text:span text:style-name="T28">Flujos Alternos:</text:span></text:p>
          </table:table-cell>
          <table:table-cell table:style-name="Tabla24.B1" office:value-type="string">
            <text:p text:style-name="P300" loext:marker-style-name="T27">FA1. Gráfico de un mes específico.</text:p>
            <text:list text:style-name="L64">
              <text:list-item>
                <text:p text:style-name="P301">El administrador selecciona un mes de la lista “Mes:”.</text:p>
              </text:list-item>
              <text:list-item>
                <text:p text:style-name="P301">Regresar al paso 3 del flujo normal.</text:p>
              </text:list-item>
            </text:list>
          </table:table-cell>
        </table:table-row>
        <table:table-row table:style-name="Tabla24.1">
          <table:table-cell table:style-name="Tabla24.A1" office:value-type="string">
            <text:p text:style-name="P292" loext:marker-style-name="T27"><text:span text:style-name="T28">Excepciones:</text:span></text:p>
          </table:table-cell>
          <table:table-cell table:style-name="Tabla24.B1" office:value-type="string">
            <text:p text:style-name="P302" loext:marker-style-name="T27">EX1. Error al recuperar la información.</text:p>
            <text:list text:style-name="L65">
              <text:list-item>
                <text:p text:style-name="P303">El sistema muestra el mensaje “Error al recuperar los datos, inténtelo de nuevo”.</text:p>
              </text:list-item>
              <text:list-item>
                <text:p text:style-name="P303">Regresar al paso 2 del flujo normal.</text:p>
              </text:list-item>
            </text:list>
          </table:table-cell>
        </table:table-row>
        <table:table-row table:style-name="Tabla24.10">
          <table:table-cell table:style-name="Tabla24.A1" office:value-type="string">
            <text:p text:style-name="P292" loext:marker-style-name="T27"><text:span text:style-name="T28">Postcondiciones:</text:span></text:p>
          </table:table-cell>
          <table:table-cell table:style-name="Tabla24.B1" office:value-type="string">
            <text:p text:style-name="P304" loext:marker-style-name="T27">POS-1: Se ha mostrado el gráfico <text:span text:style-name="T183">y los datos de las ventas y egresos</text:span> correspondiente al tiempo seleccionado por el administrador.</text:p>
          </table:table-cell>
        </table:table-row>
        <table:table-row table:style-name="Tabla24.1">
          <table:table-cell table:style-name="Tabla24.A1" office:value-type="string">
            <text:p text:style-name="P292" loext:marker-style-name="T27"><text:span text:style-name="T28">Reglas de negocio:</text:span></text:p>
          </table:table-cell>
          <table:table-cell table:style-name="Tabla24.B1" office:value-type="string">
            <text:p text:style-name="P305" loext:marker-style-name="T27"><text:span text:style-name="T61">Ninguno.</text:span></text:p>
          </table:table-cell>
        </table:table-row>
        <table:table-row table:style-name="Tabla24.1">
          <table:table-cell table:style-name="Tabla24.A1" office:value-type="string">
            <text:p text:style-name="P292" loext:marker-style-name="T27"><text:span text:style-name="T28">Incluye: </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Extiende:</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Prioridad:</text:span></text:p>
          </table:table-cell>
          <table:table-cell table:style-name="Tabla24.B1" office:value-type="string">
            <text:p text:style-name="P306" loext:marker-style-name="T27"><text:span text:style-name="T61">Alta</text:span></text:p>
          </table:table-cell>
        </table:table-row>
      </table:table>
      <text:p text:style-name="P30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08"><text:bookmark-start text:name="__RefHeading___Toc2571_15024945 Copia 1"/><text:soft-page-break/>6.<text:span text:style-name="T184">4</text:span> Paquete de casos de uso – <text:span text:style-name="T184">Egresses</text:span><text:bookmark-end text:name="__RefHeading___Toc2571_15024945 Copia 1"/></text:p>
      <text:p text:style-name="Texto_20_ES"><draw:frame draw:style-name="fr3" draw:name="Imagen24" text:anchor-type="char" svg:width="12.194cm" svg:height="8.234cm" draw:z-index="10"><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309" loext:marker-style-name="T27"><text:span text:style-name="T28">ID:</text:span></text:p>
          </table:table-cell>
          <table:table-cell table:style-name="Tabla18.B1" office:value-type="string">
            <text:p text:style-name="P310" loext:marker-style-name="T27">CU<text:span text:style-name="T184">12</text:span></text:p>
          </table:table-cell>
        </table:table-row>
        <table:table-row table:style-name="Tabla18.1">
          <table:table-cell table:style-name="Tabla18.A1" office:value-type="string">
            <text:p text:style-name="P309" loext:marker-style-name="T27"><text:span text:style-name="T28">Nombre:</text:span></text:p>
          </table:table-cell>
          <table:table-cell table:style-name="Tabla18.B1" office:value-type="string">
            <text:p text:style-name="P311" loext:marker-style-name="T27">Manage egresses.</text:p>
          </table:table-cell>
        </table:table-row>
        <table:table-row table:style-name="Tabla18.1">
          <table:table-cell table:style-name="Tabla18.A1" office:value-type="string">
            <text:p text:style-name="P309" loext:marker-style-name="T27"><text:span text:style-name="T28">Descripción:</text:span></text:p>
          </table:table-cell>
          <table:table-cell table:style-name="Tabla18.B1" office:value-type="string">
            <text:p text:style-name="P311"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309" loext:marker-style-name="T27"><text:span text:style-name="T28">Actor(es):</text:span></text:p>
          </table:table-cell>
          <table:table-cell table:style-name="Tabla18.B1" office:value-type="string">
            <text:p text:style-name="P311" loext:marker-style-name="T27">User (Admin o Cashier).</text:p>
          </table:table-cell>
        </table:table-row>
        <table:table-row table:style-name="Tabla18.1">
          <table:table-cell table:style-name="Tabla18.A5" office:value-type="string">
            <text:p text:style-name="P312">Disparador:</text:p>
          </table:table-cell>
          <table:table-cell table:style-name="Tabla18.B5" office:value-type="string">
            <text:p text:style-name="P311" loext:marker-style-name="T27">El usuario da clic en el botón “Egresos” desde el menú principal.</text:p>
          </table:table-cell>
        </table:table-row>
        <table:table-row table:style-name="Tabla18.1">
          <table:table-cell table:style-name="Tabla18.A1" office:value-type="string">
            <text:p text:style-name="P309" loext:marker-style-name="T27"><text:span text:style-name="T28">Precondiciones:</text:span></text:p>
          </table:table-cell>
          <table:table-cell table:style-name="Tabla18.B1" office:value-type="string">
            <text:p text:style-name="P311" loext:marker-style-name="T27">Ninguna.</text:p>
          </table:table-cell>
        </table:table-row>
        <table:table-row table:style-name="Tabla18.1">
          <table:table-cell table:style-name="Tabla18.A1" office:value-type="string">
            <text:p text:style-name="P309" loext:marker-style-name="T27"><text:span text:style-name="T28">Flujo Normal:</text:span></text:p>
          </table:table-cell>
          <table:table-cell table:style-name="Tabla18.B1" office:value-type="string">
            <text:list text:style-name="L66">
              <text:list-item>
                <text:p text:style-name="P313">El sistema obtiene la fecha actual, recupera los gastos realizados <text:span text:style-name="T185">almacenándolos en </text:span><text:span text:style-name="T186">el arreglo</text:span><text:span text:style-name="T185"> </text:span><text:span text:style-name="T187">egresses</text:span><text:span text:style-name="T185"> </text:span>y los filtra con la fecha actual, posteriormente los muestra en la pantalla “Egresos”. <text:span text:style-name="T186">(ver EX1)</text:span></text:p>
              </text:list-item>
              <text:list-item>
                <text:p text:style-name="P314">El usuario da clic en “Registrar egreso”. (ver FA1, <text:span text:style-name="T188">FA2, FA3</text:span>)</text:p>
              </text:list-item>
              <text:list-item>
                <text:p text:style-name="P314">El sistema muestra el formulario “Datos del egreso”.</text:p>
              </text:list-item>
              <text:list-item>
                <text:p text:style-name="P314">El usuario ingresa todos los campos de manera obligatoria y da clic en “Guardar”.</text:p>
              </text:list-item>
              <text:list-item>
                <text:p text:style-name="P314">El sistema valida los datos, <text:span text:style-name="T189">crea un objeto egress con los datos ingresados,</text:span> <text:span text:style-name="T189">agrega el nombre del usuario actual,</text:span> almacena <text:span text:style-name="T189">el egress</text:span> a través del EgressesRepository y muestra el mensaje “Egreso <text:soft-page-break/>guardado”. (ver FA<text:span text:style-name="T190">4, EX2</text:span>)</text:p>
              </text:list-item>
              <text:list-item>
                <text:p text:style-name="P315">Fin del caso de uso.</text:p>
              </text:list-item>
            </text:list>
          </table:table-cell>
        </table:table-row>
        <table:table-row table:style-name="Tabla18.1">
          <table:table-cell table:style-name="Tabla18.A1" office:value-type="string">
            <text:p text:style-name="P309" loext:marker-style-name="T27"><text:span text:style-name="T28">Flujos Alternos:</text:span></text:p>
          </table:table-cell>
          <table:table-cell table:style-name="Tabla18.B1" office:value-type="string">
            <text:p text:style-name="P316" loext:marker-style-name="T27">FA1. Visualizar gastos de un día en específico.</text:p>
            <text:list text:style-name="L67">
              <text:list-item>
                <text:p text:style-name="P317">El usuario <text:span text:style-name="T185">selecciona una fecha en el selector de fecha.</text:span></text:p>
              </text:list-item>
              <text:list-item>
                <text:p text:style-name="P318">El sistema filtra <text:span text:style-name="T186">el arreglo </text:span><text:span text:style-name="T191">egresses</text:span><text:span text:style-name="T186"> con la fecha seleccionada por el usuario y los muestra en la pantalla “Egresos”.</text:span></text:p>
              </text:list-item>
              <text:list-item>
                <text:p text:style-name="P319">Regresar al paso 2 del flujo normal.</text:p>
              </text:list-item>
            </text:list>
            <text:p text:style-name="P320"/>
            <text:p text:style-name="P320">FA2. Editar egreso.</text:p>
            <text:list text:style-name="L68">
              <text:list-item>
                <text:p text:style-name="P321">El usuario da clic en el botón editar de algún egreso.</text:p>
              </text:list-item>
              <text:list-item>
                <text:p text:style-name="P321">El sistema muestra los datos del egreso <text:span text:style-name="T188">en el formulario “Datos del egreso”.</text:span></text:p>
              </text:list-item>
              <text:list-item>
                <text:p text:style-name="P322">El usuario modifica los datos de su elección y da clic en “Guardar”.</text:p>
              </text:list-item>
              <text:list-item>
                <text:p text:style-name="P322">El sistema valida los datos, lo actualiza a través del EgressesRepository y muestra el mensaje “Egreso actualizado”. <text:span text:style-name="T190">(ver FA4, EX2)</text:span></text:p>
              </text:list-item>
              <text:list-item>
                <text:p text:style-name="P322">Regresar al paso 1 del flujo normal.</text:p>
              </text:list-item>
            </text:list>
            <text:p text:style-name="P323"/>
            <text:p text:style-name="P323">FA3. Eliminar egreso.</text:p>
            <text:list text:style-name="L69">
              <text:list-item>
                <text:p text:style-name="P324">El usuario da clic en el botón eliminar de algún egreso.</text:p>
              </text:list-item>
              <text:list-item>
                <text:p text:style-name="P324">El sistema muestra el mensaje “¿Desea eliminar el egreso?”</text:p>
              </text:list-item>
              <text:list-item>
                <text:p text:style-name="P324">El usuario da clic en “Aceptar”. <text:span text:style-name="T190">(ver FA5)</text:span></text:p>
              </text:list-item>
              <text:list-item>
                <text:p text:style-name="P324">El sistema elimina el egreso a través del EgressesRepository y muestra el mensaje “Egreso eliminado”.</text:p>
              </text:list-item>
              <text:list-item>
                <text:p text:style-name="P324">Regresar al paso 1 del flujo normal.</text:p>
              </text:list-item>
            </text:list>
            <text:p text:style-name="P323"/>
            <text:p text:style-name="P323">FA4. Datos inválidos.</text:p>
            <text:list text:style-name="L70">
              <text:list-item>
                <text:p text:style-name="P325">El sistema muestra <text:span text:style-name="T47">muestra </text:span><text:span text:style-name="T48">un mensaje error dependiendo del campo que se a ingresado de forma incorrecta</text:span><text:span text:style-name="T47">.</text:span></text:p>
              </text:list-item>
              <text:list-item>
                <text:p text:style-name="P326">El <text:span text:style-name="T192">usuario</text:span> modifica los datos y da clic en “Guardar”.</text:p>
              </text:list-item>
              <text:list-item>
                <text:p text:style-name="P327"><text:span text:style-name="T87">Regresar al paso </text:span><text:span text:style-name="T193">5</text:span><text:span text:style-name="T87"> del flujo normal </text:span><text:span text:style-name="T194">o paso 4 del FA</text:span><text:span text:style-name="T195">2</text:span><text:span text:style-name="T194">.</text:span></text:p>
              </text:list-item>
            </text:list>
            <text:p text:style-name="P328"/>
            <text:p text:style-name="P329">FA5. Cancelar eliminar.</text:p>
            <text:list text:style-name="L71">
              <text:list-item>
                <text:p text:style-name="P330">El usuario da clic en “Cancelar” <text:span text:style-name="T196">del mensaje</text:span>.</text:p>
              </text:list-item>
              <text:list-item>
                <text:p text:style-name="P330">El sistema quita el mensaje de la pantalla.</text:p>
              </text:list-item>
              <text:list-item>
                <text:p text:style-name="P330">Regresar al paso 2 del flujo normal.</text:p>
              </text:list-item>
            </text:list>
          </table:table-cell>
        </table:table-row>
        <table:table-row table:style-name="Tabla18.1">
          <table:table-cell table:style-name="Tabla18.A1" office:value-type="string">
            <text:p text:style-name="P309" loext:marker-style-name="T27"><text:span text:style-name="T28">Excepciones:</text:span></text:p>
          </table:table-cell>
          <table:table-cell table:style-name="Tabla18.B1" office:value-type="string">
            <text:p text:style-name="P320" loext:marker-style-name="T27">EX1. Error al cargar los egresos.</text:p>
            <text:list text:style-name="L72">
              <text:list-item>
                <text:p text:style-name="P331">El sistema muestra el mensaje “Error al cargar la información, inténtelo de nuevo.”</text:p>
              </text:list-item>
              <text:list-item>
                <text:p text:style-name="P331">El usuario da clic en “Recargar”.</text:p>
              </text:list-item>
              <text:list-item>
                <text:p text:style-name="P331">Regresar al paso 1 del flujo normal.</text:p>
              </text:list-item>
            </text:list>
            <text:p text:style-name="P320"/>
            <text:p text:style-name="P332">EX2. Error al guardar/actualizar el egreso.</text:p>
            <text:list text:style-name="L73">
              <text:list-item>
                <text:p text:style-name="P333">El sistema muestra el mensaje “Error al guardar el egreso, inténtelo de nuevo”.</text:p>
              </text:list-item>
              <text:list-item>
                <text:p text:style-name="P333">El usuario da clic en “Guardar”.</text:p>
              </text:list-item>
              <text:list-item>
                <text:p text:style-name="P333"><text:soft-page-break/>Regresar al paso <text:span text:style-name="T193">5</text:span><text:span text:style-name="T197"> del flujo normal </text:span><text:span text:style-name="T194">o paso 4 del FA</text:span><text:span text:style-name="T195">2</text:span><text:span text:style-name="T194">.</text:span></text:p>
              </text:list-item>
            </text:list>
          </table:table-cell>
        </table:table-row>
        <table:table-row table:style-name="Tabla18.10">
          <table:table-cell table:style-name="Tabla18.A1" office:value-type="string">
            <text:p text:style-name="P309" loext:marker-style-name="T27"><text:span text:style-name="T28">Postcondiciones:</text:span></text:p>
          </table:table-cell>
          <table:table-cell table:style-name="Tabla18.B1" office:value-type="string">
            <text:p text:style-name="P334" loext:marker-style-name="T27">POS1: Se han mostrado todos los egresos del día actual.</text:p>
            <text:p text:style-name="P334" loext:marker-style-name="T27">POS2-A: Se han mostrado todos los egresos del día seleccionado.</text:p>
            <text:p text:style-name="P334" loext:marker-style-name="T27">POS2-B: Se ha guardado el egreso.</text:p>
            <text:p text:style-name="P334" loext:marker-style-name="T27">POS2-C: Se han actualizado los datos del egreso seleccionado.</text:p>
            <text:p text:style-name="P334" loext:marker-style-name="T27">POS2-D: Se han eliminado los datos del egreso seleccionado.</text:p>
          </table:table-cell>
        </table:table-row>
        <table:table-row table:style-name="Tabla18.1">
          <table:table-cell table:style-name="Tabla18.A1" office:value-type="string">
            <text:p text:style-name="P309" loext:marker-style-name="T27"><text:span text:style-name="T28">Reglas de negocio:</text:span></text:p>
          </table:table-cell>
          <table:table-cell table:style-name="Tabla18.B1" office:value-type="string">
            <text:p text:style-name="P335" loext:marker-style-name="T27"><text:span text:style-name="T61">Ninguno.</text:span></text:p>
          </table:table-cell>
        </table:table-row>
        <table:table-row table:style-name="Tabla18.1">
          <table:table-cell table:style-name="Tabla18.A1" office:value-type="string">
            <text:p text:style-name="P309" loext:marker-style-name="T27"><text:span text:style-name="T28">Incluye: </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Extiende:</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Prioridad:</text:span></text:p>
          </table:table-cell>
          <table:table-cell table:style-name="Tabla18.B1" office:value-type="string">
            <text:p text:style-name="P336" loext:marker-style-name="T27"><text:span text:style-name="T61">Alta</text:span></text:p>
          </table:table-cell>
        </table:table-row>
      </table:table>
      <text:p text:style-name="P337"/>
      <text:p text:style-name="P337"/>
      <text:p text:style-name="P337"/>
      <text:p text:style-name="P337"/>
      <text:p text:style-name="P337"/>
      <text:p text:style-name="P337"/>
      <text:p text:style-name="P337"/>
      <text:p text:style-name="P337"/>
      <text:p text:style-name="P337"/>
      <text:p text:style-name="P337"/>
      <text:p text:style-name="P338"/>
      <text:p text:style-name="P339"><text:bookmark-start text:name="__RefHeading___Toc2571_15024945 Copia 1 Copia 1"/>6.<text:span text:style-name="T198">5</text:span> Paquete de casos de uso – <text:span text:style-name="T198">Cotizations</text:span><text:bookmark-end text:name="__RefHeading___Toc2571_15024945 Copia 1 Copia 1"/></text:p>
      <text:p text:style-name="Texto_20_ES"><draw:frame draw:style-name="fr5" draw:name="Imagen25" text:anchor-type="char" svg:x="2.676cm" svg:y="0.042cm" svg:width="11.1cm" svg:height="7.054cm" draw:z-index="11"><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40" loext:marker-style-name="T27"><text:span text:style-name="T28">ID:</text:span></text:p>
          </table:table-cell>
          <table:table-cell table:style-name="Tabla22.B1" office:value-type="string">
            <text:p text:style-name="P341" loext:marker-style-name="T27">CU<text:span text:style-name="T199">13</text:span></text:p>
          </table:table-cell>
        </table:table-row>
        <table:table-row table:style-name="Tabla22.1">
          <table:table-cell table:style-name="Tabla22.A1" office:value-type="string">
            <text:p text:style-name="P340" loext:marker-style-name="T27"><text:span text:style-name="T28">Nombre:</text:span></text:p>
          </table:table-cell>
          <table:table-cell table:style-name="Tabla22.B1" office:value-type="string">
            <text:p text:style-name="P342" loext:marker-style-name="T27">Manage cotizations.</text:p>
          </table:table-cell>
        </table:table-row>
        <table:table-row table:style-name="Tabla22.1">
          <table:table-cell table:style-name="Tabla22.A1" office:value-type="string">
            <text:p text:style-name="P340" loext:marker-style-name="T27"><text:span text:style-name="T28">Descripción:</text:span></text:p>
          </table:table-cell>
          <table:table-cell table:style-name="Tabla22.B1" office:value-type="string">
            <text:p text:style-name="P342" loext:marker-style-name="T27">Permitirá al usuario (Admin o Cashier) crear, actualizar, visualizar y eliminar cotizaciones con el fin de mostrar al cliente el monto total de una posible compra para que éste tome la decisión de efectuar<text:span text:style-name="T200">la</text:span> o no.</text:p>
          </table:table-cell>
        </table:table-row>
        <table:table-row table:style-name="Tabla22.1">
          <table:table-cell table:style-name="Tabla22.A1" office:value-type="string">
            <text:p text:style-name="P340" loext:marker-style-name="T27"><text:span text:style-name="T28">Actor(es):</text:span></text:p>
          </table:table-cell>
          <table:table-cell table:style-name="Tabla22.B1" office:value-type="string">
            <text:p text:style-name="P343" loext:marker-style-name="T27">User (Admin o Cashier).</text:p>
          </table:table-cell>
        </table:table-row>
        <table:table-row table:style-name="Tabla22.1">
          <table:table-cell table:style-name="Tabla22.A5" office:value-type="string">
            <text:p text:style-name="P344">Disparador:</text:p>
          </table:table-cell>
          <table:table-cell table:style-name="Tabla22.B5" office:value-type="string">
            <text:p text:style-name="P343" loext:marker-style-name="T27">El usuario da clic en “Cotizaciones” desde el menú principal.</text:p>
          </table:table-cell>
        </table:table-row>
        <table:table-row table:style-name="Tabla22.1">
          <table:table-cell table:style-name="Tabla22.A1" office:value-type="string">
            <text:p text:style-name="P340" loext:marker-style-name="T27"><text:span text:style-name="T28">Precondiciones:</text:span></text:p>
          </table:table-cell>
          <table:table-cell table:style-name="Tabla22.B1" office:value-type="string">
            <text:p text:style-name="P343" loext:marker-style-name="T27">Ninguna.</text:p>
          </table:table-cell>
        </table:table-row>
        <table:table-row table:style-name="Tabla22.1">
          <table:table-cell table:style-name="Tabla22.A1" office:value-type="string">
            <text:p text:style-name="P340" loext:marker-style-name="T27"><text:span text:style-name="T28">Flujo Normal:</text:span></text:p>
          </table:table-cell>
          <table:table-cell table:style-name="Tabla22.B1" office:value-type="string">
            <text:list text:style-name="L74">
              <text:list-item>
                <text:p text:style-name="P345">El sistema recupera todas las cotizaciones registradas y las almacena en el arreglo <text:span text:style-name="T65">cotizations</text:span>, posteriormente, las muestra en la pantalla “Cotizaciones”.</text:p>
              </text:list-item>
              <text:list-item>
                <text:p text:style-name="P345">El usuario da clic en “Nueva cotización”. <text:span text:style-name="T201">(ver FA1, </text:span><text:span text:style-name="T202">FA</text:span><text:span text:style-name="T203">2</text:span><text:span text:style-name="T201">)</text:span></text:p>
              </text:list-item>
              <text:list-item>
                <text:p text:style-name="P345">El sistema muestra la ventana “Cotización” <text:span text:style-name="T204">y</text:span> <text:span text:style-name="T204">crea un arreglo </text:span><text:span text:style-name="T205">products</text:span><text:span text:style-name="T204"> vació.</text:span></text:p>
              </text:list-item>
              <text:list-item>
                <text:p text:style-name="P346">El usuario ingresa el nombre del cliente a realizar la cotización.</text:p>
              </text:list-item>
              <text:list-item>
                <text:p text:style-name="P347">El usuario ingresa el nombre <text:s/>o código de un producto en el cuadro de búsqueda.</text:p>
              </text:list-item>
              <text:list-item>
                <text:p text:style-name="P347">El sistema busca el producto a través de su nombre o código y muestra los resultados que coincidan con el texto ingresado.</text:p>
              </text:list-item>
              <text:list-item>
                <text:p text:style-name="P347">El usuario selecciona un producto <text:span text:style-name="T206">y especifica las unidades a cotizar</text:span>.</text:p>
              </text:list-item>
              <text:list-item>
                <text:p text:style-name="P347">El sistema agrega el producto seleccionado al arreglo <text:span text:style-name="T65">products, </text:span><text:span text:style-name="T207">realiza</text:span><text:span text:style-name="T208"> </text:span><text:span text:style-name="T207">la sumatoria de los precios de los productos multiplicado por las unidades de cada uno </text:span>y lo muestra en pantalla.</text:p>
              </text:list-item>
              <text:list-item>
                <text:p text:style-name="P347">El usuario da clic en “<text:span text:style-name="T209">Guardar</text:span><text:span text:style-name="T210"> cotización</text:span>”. <text:span text:style-name="T201">(ver FA</text:span><text:span text:style-name="T211">4</text:span><text:span text:style-name="T201">, </text:span><text:span text:style-name="T212">FA</text:span><text:span text:style-name="T211">5</text:span><text:span text:style-name="T201">)</text:span></text:p>
              </text:list-item>
              <text:list-item>
                <text:p text:style-name="P348">El sistema crea un objeto <text:span text:style-name="T65">cotization</text:span><text:span text:style-name="T210">, </text:span>agrega<text:span text:style-name="T213"> </text:span>la fecha/hora actual <text:span text:style-name="T213">junto </text:span><text:soft-page-break/><text:span text:style-name="T213">al </text:span><text:span text:style-name="T214">arreglo</text:span><text:span text:style-name="T215"> products </text:span><text:span text:style-name="T216">y el nombre del usuario actual</text:span><text:span text:style-name="T215">,</text:span><text:span text:style-name="T65"> </text:span>posteriormente, lo almacena a través del CotizationRepository y muestra el mensaje “Cotización guardada <text:span text:style-name="T217">en el sistema”.</text:span> <text:span text:style-name="T201">(ver </text:span><text:span text:style-name="T218">EX1</text:span><text:span text:style-name="T201">)</text:span></text:p>
              </text:list-item>
              <text:list-item>
                <text:p text:style-name="P349">El sistema exporta el objeto <text:span text:style-name="T65">cotization</text:span> a pdf y lo abre.</text:p>
              </text:list-item>
              <text:list-item>
                <text:p text:style-name="P350">El usuario da clic en “Cerrar”.</text:p>
              </text:list-item>
              <text:list-item>
                <text:p text:style-name="P351">El sistema actualiza el arreglo <text:span text:style-name="T65">cotizations</text:span> y los muestra en la pantalla “Cotizaciones”.</text:p>
              </text:list-item>
              <text:list-item>
                <text:p text:style-name="P351">Fin del caso de uso.</text:p>
              </text:list-item>
            </text:list>
          </table:table-cell>
        </table:table-row>
        <table:table-row table:style-name="Tabla22.1">
          <table:table-cell table:style-name="Tabla22.A1" office:value-type="string">
            <text:p text:style-name="P340" loext:marker-style-name="T27"><text:span text:style-name="T28">Flujos Alternos:</text:span></text:p>
          </table:table-cell>
          <table:table-cell table:style-name="Tabla22.B1" office:value-type="string">
            <text:p text:style-name="P352">FA<text:span text:style-name="T219">1</text:span>. <text:span text:style-name="T219">Mostrar pdf de la cotización.</text:span></text:p>
            <text:list text:style-name="L75">
              <text:list-item>
                <text:p text:style-name="P353">El usuario da clic en el icono de PDF de alguna cotización.</text:p>
              </text:list-item>
              <text:list-item>
                <text:p text:style-name="P354"><text:span text:style-name="T219">El sistema recupera los</text:span><text:span text:style-name="T220"> products</text:span><text:span text:style-name="T219"> mediante el id almacenado de cada uno para tener los precios actualizados,</text:span><text:span text:style-name="T220"> </text:span><text:span text:style-name="T219">genera el archivo PDF con los datos de la </text:span><text:span text:style-name="T220">cotization</text:span><text:span text:style-name="T219"> seleccionada y lo muestra en el cuadro de dialogo del sistema.</text:span></text:p>
              </text:list-item>
              <text:list-item>
                <text:p text:style-name="P353">El usuario da clic en “Cerrar”.</text:p>
              </text:list-item>
              <text:list-item>
                <text:p text:style-name="P355">Regresar al paso 1 del flujo normal.</text:p>
              </text:list-item>
            </text:list>
            <text:p text:style-name="P356"/>
            <text:p text:style-name="P357">FA<text:span text:style-name="T203">2</text:span>. Eliminar cotización.</text:p>
            <text:list text:style-name="L76">
              <text:list-item>
                <text:p text:style-name="P358">El usuario da clic en el icono de eliminar de alguna cotización.</text:p>
              </text:list-item>
              <text:list-item>
                <text:p text:style-name="P358">El sistema muestra el mensaje “¿Desea eliminar la cotización?”.</text:p>
              </text:list-item>
              <text:list-item>
                <text:p text:style-name="P358">El usuario da clic en “Aceptar”.</text:p>
              </text:list-item>
              <text:list-item>
                <text:p text:style-name="P358">El sistema elimina la cotización mediante el CotizationRepository y muestra el mensaje “Cotización eliminada”.</text:p>
              </text:list-item>
              <text:list-item>
                <text:p text:style-name="P358">Regresar al paso 13 del flujo normal.</text:p>
              </text:list-item>
            </text:list>
            <text:p text:style-name="P357"/>
            <text:p text:style-name="P359">FA<text:span text:style-name="T211">3</text:span>. Actualizar cotización.</text:p>
            <text:list text:style-name="L77">
              <text:list-item>
                <text:p text:style-name="P360">El usuario da clic en el icono de actualizar de alguna cotización.</text:p>
              </text:list-item>
              <text:list-item>
                <text:p text:style-name="P360">El sistema muestra la pantalla “Cotización” con los datos de la cotización seleccionada.</text:p>
              </text:list-item>
              <text:list-item>
                <text:p text:style-name="P360">Regresar al paso 5 del flujo normal.</text:p>
              </text:list-item>
            </text:list>
            <text:p text:style-name="P361" loext:marker-style-name="T27"/>
            <text:p text:style-name="P361" loext:marker-style-name="T27">FA<text:span text:style-name="T211">4</text:span>. Agregar otro producto a la cotización.</text:p>
            <text:list text:style-name="L78">
              <text:list-item>
                <text:p text:style-name="P362">El usuario <text:span text:style-name="T201">da clic en el cuadro de búsqueda.</text:span></text:p>
              </text:list-item>
              <text:list-item>
                <text:p text:style-name="P363">Regresar al paso 5 del flujo normal.</text:p>
              </text:list-item>
            </text:list>
            <text:p text:style-name="P364"/>
            <text:p text:style-name="P365">FA5. Eliminar producto de la cotización.</text:p>
            <text:list text:style-name="L79">
              <text:list-item>
                <text:p text:style-name="P366">El usuario da clic en el botón de eliminar de algún producto.</text:p>
              </text:list-item>
              <text:list-item>
                <text:p text:style-name="P366">El sistema elimina del arreglo <text:span text:style-name="T65">products</text:span> el producto seleccionado y <text:span text:style-name="T207">realiza</text:span><text:span text:style-name="T208"> </text:span><text:span text:style-name="T207">la sumatoria de los precios de los productos multiplicado por las unidades de cada uno </text:span><text:span text:style-name="T204">y lo muestra en pantalla.</text:span></text:p>
              </text:list-item>
              <text:list-item>
                <text:p text:style-name="P366">Regresar al paso 9 del flujo normal.</text:p>
              </text:list-item>
            </text:list>
          </table:table-cell>
        </table:table-row>
        <table:table-row table:style-name="Tabla22.1">
          <table:table-cell table:style-name="Tabla22.A1" office:value-type="string">
            <text:p text:style-name="P340" loext:marker-style-name="T27"><text:span text:style-name="T28">Excepciones:</text:span></text:p>
          </table:table-cell>
          <table:table-cell table:style-name="Tabla22.B1" office:value-type="string">
            <text:p text:style-name="P367" loext:marker-style-name="T27">EX1. Error al guardar la cotización.</text:p>
            <text:list text:style-name="L80">
              <text:list-item>
                <text:p text:style-name="P368">El sistema muestra el mensaje “Error al guardar la cotización, inténtelo de nuevo”.</text:p>
              </text:list-item>
              <text:list-item>
                <text:p text:style-name="P368">El usuario da clic en “Finalizar cotización”.</text:p>
              </text:list-item>
              <text:list-item>
                <text:p text:style-name="P368">Regresar al paso 9 del flujo normal.</text:p>
              </text:list-item>
            </text:list>
          </table:table-cell>
        </table:table-row>
        <text:soft-page-break/>
        <table:table-row table:style-name="Tabla22.10">
          <table:table-cell table:style-name="Tabla22.A1" office:value-type="string">
            <text:p text:style-name="P340" loext:marker-style-name="T27"><text:span text:style-name="T28">Postcondiciones:</text:span></text:p>
          </table:table-cell>
          <table:table-cell table:style-name="Tabla22.B1" office:value-type="string">
            <text:p text:style-name="P369" loext:marker-style-name="T27">POS-1: Se ha almacenado los datos de la cotización.</text:p>
            <text:p text:style-name="P369" loext:marker-style-name="T27">POS-2: Se ha actualizado la lista de las cotizaciones en la pantalla “Cotizaciones”.</text:p>
            <text:p text:style-name="P369" loext:marker-style-name="T27">POS-3: Se ha exportado y abierto la cotización en formato PDF.</text:p>
          </table:table-cell>
        </table:table-row>
        <table:table-row table:style-name="Tabla22.1">
          <table:table-cell table:style-name="Tabla22.A1" office:value-type="string">
            <text:p text:style-name="P340" loext:marker-style-name="T27"><text:span text:style-name="T28">Reglas de negocio:</text:span></text:p>
          </table:table-cell>
          <table:table-cell table:style-name="Tabla22.B1" office:value-type="string">
            <text:p text:style-name="P370" loext:marker-style-name="T27"><text:span text:style-name="T61">Ninguno.</text:span></text:p>
          </table:table-cell>
        </table:table-row>
        <table:table-row table:style-name="Tabla22.1">
          <table:table-cell table:style-name="Tabla22.A1" office:value-type="string">
            <text:p text:style-name="P340" loext:marker-style-name="T27"><text:span text:style-name="T28">Incluye: </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Extiende:</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Prioridad:</text:span></text:p>
          </table:table-cell>
          <table:table-cell table:style-name="Tabla22.B1" office:value-type="string">
            <text:p text:style-name="P371" loext:marker-style-name="T27"><text:span text:style-name="T61">Alta</text:span></text:p>
          </table:table-cell>
        </table:table-row>
      </table:table>
      <text:p text:style-name="P372"/>
      <table:table table:name="Tabla23" table:style-name="Tabla23">
        <table:table-column table:style-name="Tabla23.A"/>
        <table:table-column table:style-name="Tabla23.B"/>
        <table:table-row table:style-name="Tabla23.1">
          <table:table-cell table:style-name="Tabla23.A1" office:value-type="string">
            <text:p text:style-name="P340" loext:marker-style-name="T27"><text:span text:style-name="T28">ID:</text:span></text:p>
          </table:table-cell>
          <table:table-cell table:style-name="Tabla23.B1" office:value-type="string">
            <text:p text:style-name="P341" loext:marker-style-name="T27">CU<text:span text:style-name="T221">14</text:span></text:p>
          </table:table-cell>
        </table:table-row>
        <table:table-row table:style-name="Tabla23.1">
          <table:table-cell table:style-name="Tabla23.A1" office:value-type="string">
            <text:p text:style-name="P340" loext:marker-style-name="T27"><text:span text:style-name="T28">Nombre:</text:span></text:p>
          </table:table-cell>
          <table:table-cell table:style-name="Tabla23.B1" office:value-type="string">
            <text:p text:style-name="P373" loext:marker-style-name="T27">Buy cotization.</text:p>
          </table:table-cell>
        </table:table-row>
        <table:table-row table:style-name="Tabla23.1">
          <table:table-cell table:style-name="Tabla23.A1" office:value-type="string">
            <text:p text:style-name="P340" loext:marker-style-name="T27"><text:span text:style-name="T28">Descripción:</text:span></text:p>
          </table:table-cell>
          <table:table-cell table:style-name="Tabla23.B1" office:value-type="string">
            <text:p text:style-name="P373"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40" loext:marker-style-name="T27"><text:span text:style-name="T28">Actor(es):</text:span></text:p>
          </table:table-cell>
          <table:table-cell table:style-name="Tabla23.B1" office:value-type="string">
            <text:p text:style-name="P373" loext:marker-style-name="T27">User (Admin o Cashier).</text:p>
          </table:table-cell>
        </table:table-row>
        <table:table-row table:style-name="Tabla23.1">
          <table:table-cell table:style-name="Tabla23.A5" office:value-type="string">
            <text:p text:style-name="P344">Disparador:</text:p>
          </table:table-cell>
          <table:table-cell table:style-name="Tabla23.B5" office:value-type="string">
            <text:p text:style-name="P373"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40" loext:marker-style-name="T27"><text:span text:style-name="T28">Precondiciones:</text:span></text:p>
          </table:table-cell>
          <table:table-cell table:style-name="Tabla23.B1" office:value-type="string">
            <text:p text:style-name="P373" loext:marker-style-name="T27">Ninguna.</text:p>
          </table:table-cell>
        </table:table-row>
        <table:table-row table:style-name="Tabla23.1">
          <table:table-cell table:style-name="Tabla23.A1" office:value-type="string">
            <text:p text:style-name="P340" loext:marker-style-name="T27"><text:span text:style-name="T28">Flujo Normal:</text:span></text:p>
          </table:table-cell>
          <table:table-cell table:style-name="Tabla23.B1" office:value-type="string">
            <text:list text:style-name="L81">
              <text:list-item>
                <text:p text:style-name="P374">El sistema muestra el mensaje “¿Realizar la venta de esta cotización?”</text:p>
              </text:list-item>
              <text:list-item>
                <text:p text:style-name="P374">El usuario da clic en “Aceptar”. (ver FA1)</text:p>
              </text:list-item>
              <text:list-item>
                <text:p text:style-name="P374">El sistema carga todos los productos del arreglo <text:span text:style-name="T65">products</text:span> de la cotización en la pantalla “Nueva venta”.</text:p>
              </text:list-item>
              <text:list-item>
                <text:p text:style-name="P374">Ver el paso 5 del flujor normal del CU05.</text:p>
              </text:list-item>
              <text:list-item>
                <text:p text:style-name="P374">Fin del caso de uso.</text:p>
              </text:list-item>
            </text:list>
          </table:table-cell>
        </table:table-row>
        <table:table-row table:style-name="Tabla23.1">
          <table:table-cell table:style-name="Tabla23.A1" office:value-type="string">
            <text:p text:style-name="P340" loext:marker-style-name="T27"><text:span text:style-name="T28">Flujos Alternos:</text:span></text:p>
          </table:table-cell>
          <table:table-cell table:style-name="Tabla23.B1" office:value-type="string">
            <text:p text:style-name="P375" loext:marker-style-name="T27">FA1. El usuario cancela.</text:p>
            <text:list text:style-name="L82">
              <text:list-item>
                <text:p text:style-name="P376">El usuario da clic en “Cancelar”.</text:p>
              </text:list-item>
              <text:list-item>
                <text:p text:style-name="P376">Fin del caso de uso.</text:p>
              </text:list-item>
            </text:list>
          </table:table-cell>
        </table:table-row>
        <table:table-row table:style-name="Tabla23.1">
          <table:table-cell table:style-name="Tabla23.A1" office:value-type="string">
            <text:p text:style-name="P340" loext:marker-style-name="T27"><text:span text:style-name="T28">Excepciones:</text:span></text:p>
          </table:table-cell>
          <table:table-cell table:style-name="Tabla23.B1" office:value-type="string">
            <text:p text:style-name="P377" loext:marker-style-name="T27">Ninguna.</text:p>
          </table:table-cell>
        </table:table-row>
        <table:table-row table:style-name="Tabla23.10">
          <table:table-cell table:style-name="Tabla23.A1" office:value-type="string">
            <text:p text:style-name="P340" loext:marker-style-name="T27"><text:span text:style-name="T28">Postcondiciones:</text:span></text:p>
          </table:table-cell>
          <table:table-cell table:style-name="Tabla23.B1" office:value-type="string">
            <text:p text:style-name="P373" loext:marker-style-name="T27">POS-1: Se ha mostrado la pantalla “Nueva venta” con los productos de la cotización seleccionada.</text:p>
          </table:table-cell>
        </table:table-row>
        <table:table-row table:style-name="Tabla23.1">
          <table:table-cell table:style-name="Tabla23.A1" office:value-type="string">
            <text:p text:style-name="P340" loext:marker-style-name="T27"><text:span text:style-name="T28">Reglas de negocio:</text:span></text:p>
          </table:table-cell>
          <table:table-cell table:style-name="Tabla23.B1" office:value-type="string">
            <text:p text:style-name="P370" loext:marker-style-name="T27"><text:span text:style-name="T61">Ninguno.</text:span></text:p>
          </table:table-cell>
        </table:table-row>
        <table:table-row table:style-name="Tabla23.1">
          <table:table-cell table:style-name="Tabla23.A1" office:value-type="string">
            <text:p text:style-name="P340" loext:marker-style-name="T27"><text:span text:style-name="T28">Incluye: </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Extiende:</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Prioridad:</text:span></text:p>
          </table:table-cell>
          <table:table-cell table:style-name="Tabla23.B1" office:value-type="string">
            <text:p text:style-name="P371" loext:marker-style-name="T27"><text:span text:style-name="T61">Alta</text:span></text:p>
          </table:table-cell>
        </table:table-row>
      </table:table>
      <text:p text:style-name="P372"/>
      <text:p text:style-name="Texto_20_ES"/>
      <text:p text:style-name="Texto_20_ES"/>
      <text:p text:style-name="P378"/>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79"><text:bookmark-start text:name="__RefHeading___Toc2849_660783722"/>6.1 Pantalla - Primer uso<text:bookmark-end text:name="__RefHeading___Toc2849_660783722"/></text:p>
      <text:p text:style-name="Texto_20_ES"><draw:frame draw:style-name="fr2" draw:name="Imagen8" text:anchor-type="char" svg:width="15.589cm" svg:height="9.158cm" draw:z-index="8"><draw:image xlink:href="Pictures/100000000000078000000468674304CE.png" xlink:type="simple" xlink:show="embed" xlink:actuate="onLoad" draw:mime-type="image/png"/></draw:frame></text:p>
      <text:p text:style-name="P379"><text:bookmark-start text:name="__RefHeading___Toc2847_660783722"/>6.2 Pantalla – Login<text:bookmark-end text:name="__RefHeading___Toc2847_660783722"/></text:p>
      <text:p text:style-name="Texto_20_ES"><draw:frame draw:style-name="fr2"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Texto_20_ES"/>
      <text:p text:style-name="Texto_20_ES"/>
      <text:p text:style-name="P380"><text:bookmark-start text:name="__RefHeading___Toc2845_660783722"/>6.<text:span text:style-name="T222">3</text:span> Pantalla – <text:span text:style-name="T222">Nueva venta</text:span><text:bookmark-end text:name="__RefHeading___Toc2845_660783722"/></text:p>
      <text:p text:style-name="Texto_20_ES"><draw:frame draw:style-name="fr2" draw:name="Imagen9" text:anchor-type="char" svg:width="15.589cm" svg:height="8.216cm" draw:z-index="14"><draw:image xlink:href="Pictures/1000000000000556000002D05E179F0C.png" xlink:type="simple" xlink:show="embed" xlink:actuate="onLoad" draw:mime-type="image/png"/></draw:frame></text:p>
      <text:p text:style-name="Texto_20_ES"/>
      <text:p text:style-name="P381"><text:bookmark-start text:name="__RefHeading___Toc2851_660783722"/>6.<text:span text:style-name="T223">3</text:span>.1 Pantalla – <text:span text:style-name="T223">Consultar ventas</text:span><text:bookmark-end text:name="__RefHeading___Toc2851_660783722"/></text:p>
      <text:p text:style-name="P382"><draw:frame draw:style-name="fr2" draw:name="Imagen19" text:anchor-type="char" svg:width="15.589cm" svg:height="8.216cm" draw:z-index="15"><draw:image xlink:href="Pictures/1000000000000556000002D03CDEF04B.png" xlink:type="simple" xlink:show="embed" xlink:actuate="onLoad" draw:mime-type="image/png"/></draw:frame></text:p>
      <text:p text:style-name="Texto_20_ES"><text:soft-page-break/></text:p>
      <text:p text:style-name="Texto_20_ES"/>
      <text:p text:style-name="P383"><text:bookmark-start text:name="__RefHeading___Toc2867_660783722"/>6.<text:span text:style-name="T223">3</text:span>.<text:span text:style-name="T224">2</text:span> Pantalla – <text:span text:style-name="T224">Corte de caja</text:span><text:bookmark-end text:name="__RefHeading___Toc2867_660783722"/></text:p>
      <text:p text:style-name="Texto_20_ES"><draw:frame draw:style-name="fr2" draw:name="Imagen20" text:anchor-type="char" svg:width="15.589cm" svg:height="8.216cm" draw:z-index="16"><draw:image xlink:href="Pictures/1000000000000556000002D044D50629.png" xlink:type="simple" xlink:show="embed" xlink:actuate="onLoad" draw:mime-type="image/png"/></draw:frame></text:p>
      <text:p text:style-name="Texto_20_ES"/>
      <text:p text:style-name="P384"><text:bookmark-start text:name="__RefHeading___Toc2853_660783722 Copia 1"/>6.<text:span text:style-name="T225">4</text:span> Pantalla – <text:span text:style-name="T225">Egresos</text:span><text:bookmark-end text:name="__RefHeading___Toc2853_660783722 Copia 1"/></text:p>
      <text:p text:style-name="Texto_20_ES"><draw:frame draw:style-name="fr1" draw:name="Imagen26" text:anchor-type="char" svg:width="15.589cm" svg:height="8.216cm" draw:z-index="26"><draw:image xlink:href="Pictures/1000000000000556000002D08EB3E518.png" xlink:type="simple" xlink:show="embed" xlink:actuate="onLoad" draw:mime-type="image/png"/></draw:frame></text:p>
      <text:p text:style-name="Texto_20_ES"/>
      <text:p text:style-name="Texto_20_ES"><text:soft-page-break/></text:p>
      <text:p text:style-name="Texto_20_ES"/>
      <text:p text:style-name="P385"><text:bookmark-start text:name="__RefHeading___Toc2867_660783722 Copia 1"/>6.<text:span text:style-name="T226">4</text:span>.<text:span text:style-name="T226">1</text:span> Pantalla – <text:span text:style-name="T226">Nuevo egreso</text:span><text:bookmark-end text:name="__RefHeading___Toc2867_660783722 Copia 1"/></text:p>
      <text:p text:style-name="Texto_20_ES"><draw:frame draw:style-name="fr2" draw:name="Imagen27" text:anchor-type="char" svg:width="15.589cm" svg:height="8.216cm" draw:z-index="27"><draw:image xlink:href="Pictures/1000000000000556000002D0937D4AA8.png" xlink:type="simple" xlink:show="embed" xlink:actuate="onLoad" draw:mime-type="image/png"/></draw:frame></text:p>
      <text:p text:style-name="Texto_20_ES"/>
      <text:p text:style-name="P386"><text:bookmark-start text:name="__RefHeading___Toc2843_660783722 Copia 1"/><text:span text:style-name="T227">6.</text:span><text:span text:style-name="T228">5</text:span><text:span text:style-name="T227"> Pantalla – </text:span><text:span text:style-name="T228">Cotizaciones</text:span><text:bookmark-end text:name="__RefHeading___Toc2843_660783722 Copia 1"/></text:p>
      <text:p text:style-name="Texto_20_ES"><draw:frame draw:style-name="fr1" draw:name="Imagen28" text:anchor-type="char" svg:width="15.589cm" svg:height="8.216cm" draw:z-index="28"><draw:image xlink:href="Pictures/1000000000000556000002D0D74F9889.png" xlink:type="simple" xlink:show="embed" xlink:actuate="onLoad" draw:mime-type="image/png"/></draw:frame></text:p>
      <text:p text:style-name="Texto_20_ES"/>
      <text:p text:style-name="Texto_20_ES"><text:soft-page-break/></text:p>
      <text:p text:style-name="Texto_20_ES"/>
      <text:p text:style-name="P387"><text:bookmark-start text:name="__RefHeading___Toc2867_660783722 Copia 2"/>6.<text:span text:style-name="T228">5</text:span>.<text:span text:style-name="T228">1</text:span> Pantalla – <text:span text:style-name="T228">Nueva cotización</text:span><text:bookmark-end text:name="__RefHeading___Toc2867_660783722 Copia 2"/></text:p>
      <text:p text:style-name="Texto_20_ES"><draw:frame draw:style-name="fr2" draw:name="Imagen29" text:anchor-type="char" svg:width="15.589cm" svg:height="8.216cm" draw:z-index="29"><draw:image xlink:href="Pictures/1000000000000556000002D0BD0C8B8D.png" xlink:type="simple" xlink:show="embed" xlink:actuate="onLoad" draw:mime-type="image/png"/></draw:frame></text:p>
      <text:p text:style-name="Texto_20_ES"/>
      <text:p text:style-name="P388"><text:bookmark-start text:name="__RefHeading___Toc2867_660783722 Copia 2 Copia 1"/>6.<text:span text:style-name="T228">5</text:span>.<text:span text:style-name="T229">2</text:span> Pantalla – <text:span text:style-name="T229">Cotización PDF</text:span><text:bookmark-end text:name="__RefHeading___Toc2867_660783722 Copia 2 Copia 1"/></text:p>
      <text:p text:style-name="Texto_20_ES"><text:bookmark-start text:name="__RefHeading___Toc2867_660783722 Copia 2 Copia 2"/><draw:frame draw:style-name="fr1" draw:name="Imagen30" text:anchor-type="char" svg:width="15.589cm" svg:height="8.216cm" draw:z-index="30"><draw:image xlink:href="Pictures/1000000000000556000002D094F6C3A2.png" xlink:type="simple" xlink:show="embed" xlink:actuate="onLoad" draw:mime-type="image/png"/></draw:frame><text:bookmark-end text:name="__RefHeading___Toc2867_660783722 Copia 2 Copia 2"/></text:p>
      <text:p text:style-name="Texto_20_ES"/>
      <text:p text:style-name="Texto_20_ES"><text:soft-page-break/></text:p>
      <text:p text:style-name="Texto_20_ES"/>
      <text:p text:style-name="P389"><text:bookmark-start text:name="__RefHeading___Toc2843_660783722"/><text:span text:style-name="T227">6.</text:span><text:span text:style-name="T229">6</text:span><text:span text:style-name="T227"> Pantalla – </text:span><text:span text:style-name="T230">Inventario</text:span><text:bookmark-end text:name="__RefHeading___Toc2843_660783722"/></text:p>
      <text:p text:style-name="Texto_20_ES"><draw:frame draw:style-name="fr2" draw:name="Imagen11" text:anchor-type="char" svg:width="15.589cm" svg:height="8.216cm" draw:z-index="17"><draw:image xlink:href="Pictures/1000000000000556000002D018A97BA8.png" xlink:type="simple" xlink:show="embed" xlink:actuate="onLoad" draw:mime-type="image/png"/></draw:frame></text:p>
      <text:p text:style-name="Texto_20_ES"/>
      <text:p text:style-name="Texto_20_ES"/>
      <text:p text:style-name="Texto_20_ES"/>
      <text:p text:style-name="P390"><text:bookmark-start text:name="__RefHeading___Toc2865_660783722"/>6.<text:span text:style-name="T229">6</text:span>.1 Pantalla – Datos del producto<text:bookmark-end text:name="__RefHeading___Toc2865_660783722"/></text:p>
      <text:p text:style-name="Texto_20_ES"><draw:frame draw:style-name="fr2" draw:name="Imagen14" text:anchor-type="char" svg:width="15.589cm" svg:height="8.216cm" draw:z-index="13"><draw:image xlink:href="Pictures/1000000000000556000002D0B6132318.png" xlink:type="simple" xlink:show="embed" xlink:actuate="onLoad" draw:mime-type="image/png"/></draw:frame></text:p>
      <text:p text:style-name="Texto_20_ES"><text:soft-page-break/></text:p>
      <text:p text:style-name="P390"><text:bookmark-start text:name="__RefHeading___Toc2863_660783722"/>6.<text:span text:style-name="T229">6</text:span>.2 Pantalla – Categorías<text:bookmark-end text:name="__RefHeading___Toc2863_660783722"/></text:p>
      <text:p text:style-name="Texto_20_ES"><draw:frame draw:style-name="fr2" draw:name="Imagen15" text:anchor-type="char" svg:width="15.589cm" svg:height="8.216cm" draw:z-index="18"><draw:image xlink:href="Pictures/1000000000000556000002D0F4FC4DA8.png" xlink:type="simple" xlink:show="embed" xlink:actuate="onLoad" draw:mime-type="image/png"/></draw:frame></text:p>
      <text:p text:style-name="Texto_20_ES"/>
      <text:p text:style-name="Texto_20_ES"/>
      <text:p text:style-name="Texto_20_ES"/>
      <text:p text:style-name="P390"><text:bookmark-start text:name="__RefHeading___Toc2861_660783722"/>6.<text:span text:style-name="T229">6</text:span>.3 Pantalla – Datos de la categoría<text:bookmark-end text:name="__RefHeading___Toc2861_660783722"/></text:p>
      <text:p text:style-name="P391"><draw:frame draw:style-name="fr1" draw:name="Imagen16" text:anchor-type="char" svg:width="15.589cm" svg:height="8.216cm" draw:z-index="19"><draw:image xlink:href="Pictures/1000000000000556000002D046DF2E83.png" xlink:type="simple" xlink:show="embed" xlink:actuate="onLoad" draw:mime-type="image/png"/></draw:frame></text:p>
      <text:p text:style-name="Texto_20_ES"><text:soft-page-break/></text:p>
      <text:p text:style-name="P392"><text:bookmark-start text:name="__RefHeading___Toc2859_660783722"/>6.<text:span text:style-name="T229">6</text:span>.<text:span text:style-name="T231">4</text:span> Pantalla – <text:span text:style-name="T231">Incrementar stock</text:span><text:bookmark-end text:name="__RefHeading___Toc2859_660783722"/></text:p>
      <text:p text:style-name="Texto_20_ES"><draw:frame draw:style-name="fr2" draw:name="Imagen17" text:anchor-type="char" svg:width="15.589cm" svg:height="8.216cm" draw:z-index="20"><draw:image xlink:href="Pictures/1000000000000556000002D0369F0125.png" xlink:type="simple" xlink:show="embed" xlink:actuate="onLoad" draw:mime-type="image/png"/></draw:frame></text:p>
      <text:p text:style-name="Texto_20_ES"/>
      <text:p text:style-name="Texto_20_ES"/>
      <text:p text:style-name="Texto_20_ES"/>
      <text:p text:style-name="P393"><text:bookmark-start text:name="__RefHeading___Toc2857_660783722"/>6.<text:span text:style-name="T229">6</text:span>.<text:span text:style-name="T232">5</text:span> Pantalla – <text:span text:style-name="T232">Buscar producto</text:span><text:bookmark-end text:name="__RefHeading___Toc2857_660783722"/></text:p>
      <text:p text:style-name="Texto_20_ES"><draw:frame draw:style-name="fr1" draw:name="Imagen18" text:anchor-type="char" svg:width="15.589cm" svg:height="8.216cm" draw:z-index="21"><draw:image xlink:href="Pictures/1000000000000556000002D0565569D1.png" xlink:type="simple" xlink:show="embed" xlink:actuate="onLoad" draw:mime-type="image/png"/></draw:frame></text:p>
      <text:p text:style-name="Texto_20_ES"><text:soft-page-break/></text:p>
      <text:p text:style-name="P389"><text:bookmark-start text:name="__RefHeading___Toc2841_660783722"/><text:span text:style-name="T227">6.</text:span><text:span text:style-name="T229">7</text:span><text:span text:style-name="T227"> Pantalla – </text:span><text:span text:style-name="T230">Usuarios</text:span><text:bookmark-end text:name="__RefHeading___Toc2841_660783722"/></text:p>
      <text:p text:style-name="P394"><draw:frame draw:style-name="fr2" draw:name="Imagen12" text:anchor-type="char" svg:width="15.589cm" svg:height="8.216cm" draw:z-index="22"><draw:image xlink:href="Pictures/1000000000000556000002D0EB089375.png" xlink:type="simple" xlink:show="embed" xlink:actuate="onLoad" draw:mime-type="image/png"/></draw:frame></text:p>
      <text:p text:style-name="Texto_20_ES"/>
      <text:p text:style-name="Texto_20_ES"/>
      <text:p text:style-name="Texto_20_ES"/>
      <text:p text:style-name="P390"><text:bookmark-start text:name="__RefHeading___Toc2855_660783722"/>6.<text:span text:style-name="T229">7</text:span>.1 <text:span text:style-name="T233">Pantalla</text:span> – Datos del usuario<text:bookmark-end text:name="__RefHeading___Toc2855_660783722"/></text:p>
      <text:p text:style-name="Texto_20_ES"><draw:frame draw:style-name="fr1" draw:name="Imagen13" text:anchor-type="char" svg:width="15.589cm" svg:height="8.216cm" draw:z-index="23"><draw:image xlink:href="Pictures/1000000000000556000002D024EBA4EF.png" xlink:type="simple" xlink:show="embed" xlink:actuate="onLoad" draw:mime-type="image/png"/></draw:frame></text:p>
      <text:p text:style-name="Texto_20_ES"><text:soft-page-break/></text:p>
      <text:p text:style-name="Texto_20_ES"/>
      <text:p text:style-name="P395"><text:bookmark-start text:name="__RefHeading___Toc2839_660783722"/><text:span text:style-name="T227">6.</text:span><text:span text:style-name="T229">8</text:span><text:span text:style-name="T227"> Pantalla – </text:span><text:span text:style-name="T234">Administración</text:span><text:bookmark-end text:name="__RefHeading___Toc2839_660783722"/></text:p>
      <text:p text:style-name="Texto_20_ES"><draw:frame draw:style-name="fr1" draw:name="Imagen21" text:anchor-type="char" svg:width="15.589cm" svg:height="9.158cm" draw:z-index="34"><draw:image xlink:href="Pictures/1000000000000780000004689938D4B2.png" xlink:type="simple" xlink:show="embed" xlink:actuate="onLoad" draw:mime-type="image/png"/></draw:frame></text:p>
      <text:p text:style-name="Texto_20_ES"/>
      <text:p text:style-name="Texto_20_ES"><draw:frame draw:style-name="fr2" draw:name="Imagen22" text:anchor-type="char" svg:width="15.589cm" svg:height="8.216cm" draw:z-index="24"><draw:image xlink:href="Pictures/1000000000000556000002D09B7B2929.png" xlink:type="simple" xlink:show="embed" xlink:actuate="onLoad" draw:mime-type="image/png"/></draw:frame></text:p>
      <text:p text:style-name="Texto_20_ES"/>
      <text:p text:style-name="Texto_20_ES"><text:soft-page-break/></text:p>
      <text:p text:style-name="P396"><text:bookmark-start text:name="__RefHeading___Toc2853_660783722"/>6.<text:span text:style-name="T229">8</text:span>.1 <text:span text:style-name="T233">Pantalla – Cortes de caja</text:span><text:bookmark-end text:name="__RefHeading___Toc2853_660783722"/></text:p>
      <text:p text:style-name="Texto_20_ES"><draw:frame draw:style-name="fr2" draw:name="Imagen23" text:anchor-type="char" svg:width="15.589cm" svg:height="8.216cm" draw:z-index="25"><draw:image xlink:href="Pictures/1000000000000556000002D091F3060D.png" xlink:type="simple" xlink:show="embed" xlink:actuate="onLoad" draw:mime-type="image/png"/></draw:frame></text:p>
      <text:p text:style-name="Texto_20_ES"/>
      <text:p text:style-name="P397"><text:bookmark-start text:name="__RefHeading___Toc2853_660783722 Copia 2"/>6.<text:span text:style-name="T229">8</text:span>.<text:span text:style-name="T235">2</text:span> <text:span text:style-name="T233">Pantalla – </text:span><text:span text:style-name="T235">Balance</text:span><text:bookmark-end text:name="__RefHeading___Toc2853_660783722 Copia 2"/></text:p>
      <text:p text:style-name="Texto_20_ES"><draw:frame draw:style-name="fr1" draw:name="Imagen31" text:anchor-type="char" svg:width="15.589cm" svg:height="9.158cm" draw:z-index="35"><draw:image xlink:href="Pictures/1000000000000780000004680A373D7D.png" xlink:type="simple" xlink:show="embed" xlink:actuate="onLoad" draw:mime-type="image/png"/></draw:frame></text:p>
      <text:p text:style-name="Texto_20_ES"/>
      <text:p text:style-name="Texto_20_ES"><text:soft-page-break/></text:p>
      <text:p text:style-name="Texto_20_ES"><draw:frame draw:style-name="fr1" draw:name="Imagen33" text:anchor-type="char" svg:width="15.589cm" svg:height="9.158cm" draw:z-index="37"><draw:image xlink:href="Pictures/1000000000000780000004680855D00E.png" xlink:type="simple" xlink:show="embed" xlink:actuate="onLoad" draw:mime-type="image/png"/></draw:frame></text:p>
      <text:p text:style-name="Texto_20_ES"/>
      <text:p text:style-name="P397"><text:bookmark-start text:name="__RefHeading___Toc2853_660783722 Copia 2 Copia 1"/>6.<text:span text:style-name="T229">8</text:span>.<text:span text:style-name="T235">3</text:span> <text:span text:style-name="T233">Pantalla – </text:span><text:span text:style-name="T235">Balance Pdf</text:span><text:bookmark-end text:name="__RefHeading___Toc2853_660783722 Copia 2 Copia 1"/></text:p>
      <text:p text:style-name="Texto_20_ES"><draw:frame draw:style-name="fr2" draw:name="Imagen32" text:anchor-type="char" svg:width="15.589cm" svg:height="9.158cm" draw:z-index="36"><draw:image xlink:href="Pictures/10000000000007800000046825AE7738.png" xlink:type="simple" xlink:show="embed" xlink:actuate="onLoad" draw:mime-type="image/png"/></draw:frame></text:p>
      <text:p text:style-name="Texto_20_ES"/>
      <text:p text:style-name="Texto_20_ES"><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P398"/>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31</meta:editing-cycles>
    <meta:creation-date>2022-04-11T19:47:00</meta:creation-date>
    <dc:date>2026-05-01T13:34:38.005209900</dc:date>
    <meta:editing-duration>P1DT11H18M37S</meta:editing-duration>
    <meta:generator>LibreOffice/26.2.1.2$Windows_X86_64 LibreOffice_project/620$Build-2</meta:generator>
    <meta:print-date>2026-04-21T10:10:34.254192100</meta:print-date>
    <meta:printed-by>Archivos PDF</meta:printed-by>
    <meta:document-statistic meta:table-count="24" meta:image-count="33" meta:object-count="0" meta:page-count="46" meta:paragraph-count="925" meta:word-count="7304" meta:character-count="43429" meta:non-whitespace-character-count="37294"/>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